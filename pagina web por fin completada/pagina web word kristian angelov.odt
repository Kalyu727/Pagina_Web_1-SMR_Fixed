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FD000000AC62210B71.png" manifest:media-type="image/png"/>
  <manifest:file-entry manifest:full-path="Pictures/10000001000003F0000000DBC1C242A9.png" manifest:media-type="image/png"/>
  <manifest:file-entry manifest:full-path="Pictures/100000010000042A000000A77BB9D6D9.png" manifest:media-type="image/png"/>
  <manifest:file-entry manifest:full-path="Pictures/100000010000042B000000DF048308DE.png" manifest:media-type="image/png"/>
  <manifest:file-entry manifest:full-path="Pictures/10000001000003F4000000CE0DD4754E.png" manifest:media-type="image/png"/>
  <manifest:file-entry manifest:full-path="Pictures/10000001000004250000008D8E6BB85F.png" manifest:media-type="image/png"/>
  <manifest:file-entry manifest:full-path="Pictures/10000001000003E3000000C07F0AD76D.png" manifest:media-type="image/png"/>
  <manifest:file-entry manifest:full-path="Pictures/10000001000003F2000002233179B01A.png" manifest:media-type="image/png"/>
  <manifest:file-entry manifest:full-path="Pictures/100000010000042E000000C3B2684541.png" manifest:media-type="image/png"/>
  <manifest:file-entry manifest:full-path="Pictures/100000010000043100000173E5E9F078.png" manifest:media-type="image/png"/>
  <manifest:file-entry manifest:full-path="Pictures/100000010000042900000091502182DC.png" manifest:media-type="image/png"/>
  <manifest:file-entry manifest:full-path="Pictures/10000001000003E900000146D609658D.png" manifest:media-type="image/png"/>
  <manifest:file-entry manifest:full-path="Pictures/100000010000042A000000E39E4A82E2.png" manifest:media-type="image/png"/>
  <manifest:file-entry manifest:full-path="Pictures/1000000100000427000000F90A643E78.png" manifest:media-type="image/png"/>
  <manifest:file-entry manifest:full-path="Pictures/100000010000042B0000013AE05873D0.png" manifest:media-type="image/png"/>
  <manifest:file-entry manifest:full-path="Pictures/100000010000042700000057BA147524.png" manifest:media-type="image/png"/>
  <manifest:file-entry manifest:full-path="Pictures/100000010000042C000001847D5D24E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/>
    <style:font-face style:name="Aptos Display1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eab7" officeooo:paragraph-rsid="001beab7"/>
    </style:style>
    <style:style style:name="P2" style:family="paragraph" style:parent-style-name="Standard">
      <style:paragraph-properties fo:text-align="center" style:justify-single-word="false"/>
      <style:text-properties style:font-name="Arial1" fo:font-size="28pt" style:text-underline-style="solid" style:text-underline-width="auto" style:text-underline-color="font-color" fo:font-weight="bold" style:font-size-asian="28pt" style:font-weight-asian="bold" style:font-name-complex="Arial2" style:font-size-complex="28pt" style:font-weight-complex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top="0cm" fo:margin-bottom="0.282cm" style:contextual-spacing="false"/>
      <style:text-properties text:display="true"/>
    </style:style>
    <style:style style:name="P8" style:family="paragraph" style:parent-style-name="Heading_20_1" style:master-page-name="Converted1">
      <style:paragraph-properties fo:line-height="150%" fo:text-align="justify" style:justify-single-word="false" style:page-number="1" loext:word-spacing-minimum="75%" loext:word-spacing-maximum="133%"/>
      <style:text-properties style:font-name="Aptos Display"/>
    </style:style>
    <style:style style:name="P9" style:family="paragraph" style:parent-style-name="Standard">
      <style:paragraph-properties fo:text-align="justify" style:justify-single-word="false" fo:keep-with-next="always" loext:word-spacing-minimum="75%" loext:word-spacing-maximum="133%"/>
    </style:style>
    <style:style style:name="P10" style:family="paragraph" style:parent-style-name="Caption">
      <style:paragraph-properties fo:text-align="justify" style:justify-single-word="false" loext:word-spacing-minimum="75%" loext:word-spacing-maximum="133%"/>
    </style:style>
    <style:style style:name="P11" style:family="paragraph" style:parent-style-name="Standard">
      <style:paragraph-properties fo:line-height="150%" fo:text-align="justify" style:justify-single-word="false" loext:word-spacing-minimum="75%" loext:word-spacing-maximum="133%"/>
    </style:style>
    <style:style style:name="P12" style:family="paragraph" style:parent-style-name="Standard">
      <style:paragraph-properties>
        <style:tab-stops>
          <style:tab-stop style:position="14.503cm" style:leader-style="solid" style:leader-text="_"/>
        </style:tab-stops>
      </style:paragraph-properties>
    </style:style>
    <style:style style:name="P13" style:family="paragraph" style:parent-style-name="Heading_20_1">
      <style:paragraph-properties fo:line-height="150%" fo:text-align="justify" style:justify-single-word="false" loext:word-spacing-minimum="75%" loext:word-spacing-maximum="133%"/>
      <style:text-properties style:font-name="Aptos Display" officeooo:rsid="001c221e" officeooo:paragraph-rsid="001c221e"/>
    </style:style>
    <style:style style:name="P14" style:family="paragraph" style:parent-style-name="Standard">
      <style:paragraph-properties fo:line-height="150%" fo:text-align="justify" style:justify-single-word="false" loext:word-spacing-minimum="75%" loext:word-spacing-maximum="133%"/>
      <style:text-properties style:font-name="Times New Roman" fo:font-size="16pt" officeooo:rsid="001c221e" officeooo:paragraph-rsid="001c221e" style:font-size-asian="16pt" style:font-name-complex="Times New Roman1" style:font-size-complex="16pt"/>
    </style:style>
    <style:style style:name="P15" style:family="paragraph" style:parent-style-name="Heading_20_1">
      <style:paragraph-properties fo:break-before="page"/>
      <style:text-properties style:font-name="Aptos Display" officeooo:rsid="001d0701" officeooo:paragraph-rsid="001d0701"/>
    </style:style>
    <style:style style:name="P16" style:family="paragraph" style:parent-style-name="Standard">
      <style:paragraph-properties fo:keep-with-next="always"/>
    </style:style>
    <style:style style:name="P17" style:family="paragraph" style:parent-style-name="Standard">
      <style:paragraph-properties fo:line-height="150%" fo:text-align="justify" style:justify-single-word="false" loext:word-spacing-minimum="75%" loext:word-spacing-maximum="133%"/>
      <style:text-properties officeooo:rsid="001d0701" officeooo:paragraph-rsid="001d0701"/>
    </style:style>
    <style:style style:name="P18" style:family="paragraph" style:parent-style-name="Standard">
      <style:paragraph-properties>
        <style:tab-stops>
          <style:tab-stop style:position="14.503cm" style:leader-style="solid" style:leader-text="_"/>
        </style:tab-stops>
      </style:paragraph-properties>
      <style:text-properties fo:color="#000000" loext:opacity="100%" officeooo:paragraph-rsid="001d0701">
        <loext:char-complex-color loext:theme-type="dark1" loext:color-type="theme"/>
      </style:text-properties>
    </style:style>
    <style:style style:name="P19" style:family="paragraph" style:parent-style-name="Heading_20_1">
      <style:text-properties style:font-name="Aptos Display" fo:font-size="24pt" style:font-size-asian="24pt" style:font-size-complex="24pt"/>
    </style:style>
    <style:style style:name="P20" style:family="paragraph" style:parent-style-name="Standard">
      <style:paragraph-properties fo:line-height="150%" fo:text-align="justify" style:justify-single-word="false" loext:word-spacing-minimum="75%" loext:word-spacing-maximum="133%">
        <style:tab-stops>
          <style:tab-stop style:position="14.503cm" style:leader-style="solid" style:leader-text="_"/>
        </style:tab-stops>
      </style:paragraph-properties>
    </style:style>
    <style:style style:name="P21" style:family="paragraph" style:parent-style-name="Standard">
      <style:paragraph-properties fo:line-height="150%" fo:text-align="justify" style:justify-single-word="false" fo:keep-with-next="always" loext:word-spacing-minimum="75%" loext:word-spacing-maximum="133%"/>
    </style:style>
    <style:style style:name="P22" style:family="paragraph" style:parent-style-name="Caption">
      <style:paragraph-properties fo:line-height="150%" fo:text-align="justify" style:justify-single-word="false" loext:word-spacing-minimum="75%" loext:word-spacing-maximum="133%"/>
    </style:style>
    <style:style style:name="P23" style:family="paragraph" style:parent-style-name="Standard">
      <style:paragraph-properties fo:line-height="150%" fo:text-align="justify" style:justify-single-word="false" loext:word-spacing-minimum="75%" loext:word-spacing-maximum="133%"/>
      <style:text-properties officeooo:rsid="001ef04e" officeooo:paragraph-rsid="001ef04e"/>
    </style:style>
    <style:style style:name="P24" style:family="paragraph" style:parent-style-name="Standard">
      <style:paragraph-properties fo:line-height="150%" fo:text-align="justify" style:justify-single-word="false" fo:break-before="page" loext:word-spacing-minimum="75%" loext:word-spacing-maximum="133%">
        <style:tab-stops>
          <style:tab-stop style:position="14.503cm" style:leader-style="solid" style:leader-text="_"/>
        </style:tab-stops>
      </style:paragraph-properties>
      <style:text-properties officeooo:paragraph-rsid="003d8fce"/>
    </style:style>
    <style:style style:name="P25" style:family="paragraph" style:parent-style-name="Heading_20_1">
      <style:text-properties fo:color="#000000" loext:opacity="100%" style:font-name="Aptos Display" fo:font-size="24pt" style:font-size-asian="24pt" style:font-size-complex="24pt"/>
    </style:style>
    <style:style style:name="P26" style:family="paragraph" style:parent-style-name="Standard">
      <style:paragraph-properties fo:line-height="150%" fo:text-align="justify" style:justify-single-word="false" loext:word-spacing-minimum="75%" loext:word-spacing-maximum="133%">
        <style:tab-stops>
          <style:tab-stop style:position="14.503cm" style:leader-style="solid" style:leader-text="_"/>
        </style:tab-stops>
      </style:paragraph-properties>
      <style:text-properties officeooo:paragraph-rsid="003d8fce"/>
    </style:style>
    <style:style style:name="P27" style:family="paragraph" style:parent-style-name="Standard">
      <style:paragraph-properties fo:line-height="150%" fo:text-align="justify" style:justify-single-word="false" loext:word-spacing-minimum="75%" loext:word-spacing-maximum="133%"/>
      <style:text-properties style:font-name="Times New Roman" fo:font-size="16pt" officeooo:rsid="001f0484" officeooo:paragraph-rsid="001f0484" style:font-size-asian="16pt" style:font-name-complex="Times New Roman1" style:font-size-complex="16pt"/>
    </style:style>
    <style:style style:name="P28" style:family="paragraph" style:parent-style-name="Standard">
      <style:paragraph-properties fo:line-height="150%" fo:text-align="justify" style:justify-single-word="false" fo:break-before="page" loext:word-spacing-minimum="75%" loext:word-spacing-maximum="133%"/>
      <style:text-properties style:font-name="Times New Roman" fo:font-size="16pt" officeooo:rsid="001f0484" officeooo:paragraph-rsid="001f0484" style:font-size-asian="16pt" style:font-name-complex="Times New Roman1" style:font-size-complex="16pt"/>
    </style:style>
    <style:style style:name="P29" style:family="paragraph" style:parent-style-name="Heading_20_1">
      <style:paragraph-properties fo:line-height="150%" fo:text-align="justify" style:justify-single-word="false" loext:word-spacing-minimum="75%" loext:word-spacing-maximum="133%"/>
      <style:text-properties style:font-name="Aptos Display" officeooo:rsid="0021b27f" officeooo:paragraph-rsid="0021b27f"/>
    </style:style>
    <style:style style:name="P30" style:family="paragraph" style:parent-style-name="Standard">
      <style:paragraph-properties fo:line-height="150%" fo:text-align="justify" style:justify-single-word="false" loext:word-spacing-minimum="75%" loext:word-spacing-maximum="133%"/>
      <style:text-properties officeooo:rsid="0021b27f" officeooo:paragraph-rsid="0021b27f"/>
    </style:style>
    <style:style style:name="P31" style:family="paragraph" style:parent-style-name="Heading_20_1">
      <style:paragraph-properties fo:margin-top="0cm" fo:margin-bottom="0.141cm" style:contextual-spacing="false"/>
      <style:text-properties style:font-name="Aptos Display" officeooo:rsid="0021b27f" officeooo:paragraph-rsid="0021b27f"/>
    </style:style>
    <style:style style:name="P32" style:family="paragraph" style:parent-style-name="Standard">
      <style:paragraph-properties fo:line-height="150%" fo:text-align="justify" style:justify-single-word="false" loext:word-spacing-minimum="75%" loext:word-spacing-maximum="133%"/>
      <style:text-properties style:font-name="Times New Roman" fo:font-size="16pt" style:font-size-asian="16pt" style:font-name-complex="Times New Roman1" style:font-size-complex="16pt"/>
    </style:style>
    <style:style style:name="P33" style:family="paragraph" style:parent-style-name="Heading_20_1">
      <style:text-properties style:font-name="Aptos Display"/>
    </style:style>
    <style:style style:name="P34" style:family="paragraph" style:parent-style-name="Heading_20_1">
      <style:paragraph-properties fo:margin-top="0cm" fo:margin-bottom="0.141cm" style:contextual-spacing="false"/>
      <style:text-properties style:font-name="Aptos Display"/>
    </style:style>
    <style:style style:name="P35" style:family="paragraph" style:parent-style-name="Standard">
      <style:paragraph-properties fo:line-height="150%" fo:text-align="justify" style:justify-single-word="false" loext:word-spacing-minimum="75%" loext:word-spacing-maximum="133%"/>
      <style:text-properties officeooo:rsid="00225958" officeooo:paragraph-rsid="00225958"/>
    </style:style>
    <style:style style:name="P36" style:family="paragraph" style:parent-style-name="Standard">
      <style:paragraph-properties fo:line-height="150%" fo:text-align="justify" style:justify-single-word="false" fo:break-before="page" loext:word-spacing-minimum="75%" loext:word-spacing-maximum="133%">
        <style:tab-stops>
          <style:tab-stop style:position="14.503cm" style:leader-style="solid" style:leader-text="_"/>
        </style:tab-stops>
      </style:paragraph-properties>
      <style:text-properties officeooo:paragraph-rsid="0021b27f"/>
    </style:style>
    <style:style style:name="P37" style:family="paragraph" style:parent-style-name="Heading_20_1">
      <style:paragraph-properties fo:line-height="150%" fo:text-align="justify" style:justify-single-word="false" loext:word-spacing-minimum="75%" loext:word-spacing-maximum="133%"/>
      <style:text-properties style:font-name="Aptos Display" officeooo:paragraph-rsid="0021b27f"/>
    </style:style>
    <style:style style:name="P38" style:family="paragraph" style:parent-style-name="Standard">
      <style:paragraph-properties fo:line-height="150%" fo:text-align="justify" style:justify-single-word="false" loext:word-spacing-minimum="75%" loext:word-spacing-maximum="133%">
        <style:tab-stops>
          <style:tab-stop style:position="14.503cm" style:leader-style="solid" style:leader-text="_"/>
        </style:tab-stops>
      </style:paragraph-properties>
      <style:text-properties officeooo:paragraph-rsid="0021b27f"/>
    </style:style>
    <style:style style:name="P39" style:family="paragraph" style:parent-style-name="Standard">
      <style:paragraph-properties fo:line-height="150%" fo:text-align="justify" style:justify-single-word="false" loext:word-spacing-minimum="75%" loext:word-spacing-maximum="133%"/>
      <style:text-properties style:font-name="Times New Roman" fo:font-size="16pt" officeooo:rsid="0024608a" officeooo:paragraph-rsid="0024608a" style:font-size-asian="16pt" style:font-name-complex="Times New Roman1" style:font-size-complex="16pt"/>
    </style:style>
    <style:style style:name="P40" style:family="paragraph" style:parent-style-name="Standard">
      <style:paragraph-properties fo:line-height="150%" fo:text-align="justify" style:justify-single-word="false" fo:break-before="page" loext:word-spacing-minimum="75%" loext:word-spacing-maximum="133%">
        <style:tab-stops>
          <style:tab-stop style:position="14.503cm" style:leader-style="solid" style:leader-text="_"/>
        </style:tab-stops>
      </style:paragraph-properties>
    </style:style>
    <style:style style:name="P41" style:family="paragraph" style:parent-style-name="Heading_20_1">
      <style:paragraph-properties fo:line-height="150%" fo:text-align="justify" style:justify-single-word="false" loext:word-spacing-minimum="75%" loext:word-spacing-maximum="133%"/>
      <style:text-properties style:font-name="Aptos Display" officeooo:rsid="0024608a" officeooo:paragraph-rsid="0024608a"/>
    </style:style>
    <style:style style:name="P42" style:family="paragraph" style:parent-style-name="Standard">
      <style:paragraph-properties fo:line-height="150%" fo:text-align="justify" style:justify-single-word="false" loext:word-spacing-minimum="75%" loext:word-spacing-maximum="133%"/>
      <style:text-properties officeooo:rsid="0024608a" officeooo:paragraph-rsid="0024608a"/>
    </style:style>
    <style:style style:name="P43" style:family="paragraph" style:parent-style-name="Heading_20_1">
      <style:text-properties style:font-name="Aptos Display" officeooo:rsid="0025b8b9" officeooo:paragraph-rsid="0025b8b9"/>
    </style:style>
    <style:style style:name="P44" style:family="paragraph" style:parent-style-name="Standard">
      <style:paragraph-properties fo:line-height="150%" fo:text-align="justify" style:justify-single-word="false" fo:break-before="page" loext:word-spacing-minimum="75%" loext:word-spacing-maximum="133%">
        <style:tab-stops>
          <style:tab-stop style:position="14.503cm" style:leader-style="solid" style:leader-text="_"/>
        </style:tab-stops>
      </style:paragraph-properties>
      <style:text-properties officeooo:paragraph-rsid="0025b8b9"/>
    </style:style>
    <style:style style:name="P45" style:family="paragraph" style:parent-style-name="Heading_20_1">
      <style:text-properties style:font-name="Aptos Display" fo:font-weight="normal" officeooo:rsid="0025b8b9" officeooo:paragraph-rsid="0025b8b9" style:font-weight-asian="normal" style:font-weight-complex="normal"/>
    </style:style>
    <style:style style:name="P46" style:family="paragraph" style:parent-style-name="Standard">
      <style:paragraph-properties fo:line-height="150%" fo:text-align="justify" style:justify-single-word="false" loext:word-spacing-minimum="75%" loext:word-spacing-maximum="133%">
        <style:tab-stops>
          <style:tab-stop style:position="14.503cm" style:leader-style="solid" style:leader-text="_"/>
        </style:tab-stops>
      </style:paragraph-properties>
      <style:text-properties officeooo:paragraph-rsid="0025b8b9"/>
    </style:style>
    <style:style style:name="P47" style:family="paragraph" style:parent-style-name="Standard">
      <style:text-properties officeooo:paragraph-rsid="0025b8b9"/>
    </style:style>
    <style:style style:name="P48" style:family="paragraph" style:parent-style-name="Standard">
      <style:paragraph-properties fo:line-height="150%" fo:text-align="justify" style:justify-single-word="false" loext:word-spacing-minimum="75%" loext:word-spacing-maximum="133%">
        <style:tab-stops>
          <style:tab-stop style:position="14.503cm" style:leader-style="solid" style:leader-text="_"/>
        </style:tab-stops>
      </style:paragraph-properties>
      <style:text-properties officeooo:paragraph-rsid="002b50c9"/>
    </style:style>
    <style:style style:name="P49" style:family="paragraph" style:parent-style-name="Heading_20_1">
      <style:text-properties style:font-name="Aptos Display" fo:font-weight="normal" officeooo:rsid="0028f5a0" officeooo:paragraph-rsid="002b237c" style:font-weight-asian="normal" style:font-weight-complex="normal"/>
    </style:style>
    <style:style style:name="P50" style:family="paragraph" style:parent-style-name="Standard">
      <style:paragraph-properties fo:line-height="150%" fo:text-align="justify" style:justify-single-word="false" loext:word-spacing-minimum="75%" loext:word-spacing-maximum="133%">
        <style:tab-stops>
          <style:tab-stop style:position="14.503cm" style:leader-style="solid" style:leader-text="_"/>
        </style:tab-stops>
      </style:paragraph-properties>
      <style:text-properties officeooo:paragraph-rsid="002b237c"/>
    </style:style>
    <style:style style:name="P51" style:family="paragraph" style:parent-style-name="Standard">
      <style:text-properties officeooo:paragraph-rsid="002b237c"/>
    </style:style>
    <style:style style:name="P52" style:family="paragraph" style:parent-style-name="Standard">
      <style:paragraph-properties fo:break-before="page"/>
      <style:text-properties style:font-name="Times New Roman" fo:font-size="16pt" officeooo:rsid="002b237c" officeooo:paragraph-rsid="002b237c" style:font-size-asian="16pt" style:font-name-complex="Times New Roman1" style:font-size-complex="16pt"/>
    </style:style>
    <style:style style:name="P53" style:family="paragraph" style:parent-style-name="Text_20_body">
      <style:text-properties style:font-name="Times New Roman" fo:font-size="16pt" officeooo:rsid="0030f0eb" officeooo:paragraph-rsid="0030f0eb" style:font-size-asian="16pt" style:font-name-complex="Times New Roman1" style:font-size-complex="16pt"/>
    </style:style>
    <style:style style:name="P54" style:family="paragraph" style:parent-style-name="Standard">
      <style:paragraph-properties fo:line-height="150%" fo:text-align="justify" style:justify-single-word="false" loext:word-spacing-minimum="75%" loext:word-spacing-maximum="133%">
        <style:tab-stops>
          <style:tab-stop style:position="14.503cm" style:leader-style="solid" style:leader-text="_"/>
        </style:tab-stops>
      </style:paragraph-properties>
      <style:text-properties officeooo:paragraph-rsid="003ec571"/>
    </style:style>
    <style:style style:name="P55" style:family="paragraph" style:parent-style-name="Heading_20_1">
      <style:text-properties style:font-name="Aptos Display" fo:font-weight="normal" officeooo:rsid="003ec571" officeooo:paragraph-rsid="003ec571" style:font-weight-asian="normal" style:font-weight-complex="normal"/>
    </style:style>
    <style:style style:name="P56" style:family="paragraph" style:parent-style-name="Text_20_body">
      <style:text-properties style:font-name="Times New Roman" fo:font-size="16pt" officeooo:rsid="003ec571" officeooo:paragraph-rsid="003ec571" style:font-size-asian="16pt" style:font-name-complex="Times New Roman1" style:font-size-complex="16pt"/>
    </style:style>
    <style:style style:name="P57" style:family="paragraph" style:parent-style-name="Standard">
      <style:paragraph-properties fo:line-height="150%" fo:text-align="justify" style:justify-single-word="false" fo:break-before="page" loext:word-spacing-minimum="75%" loext:word-spacing-maximum="133%">
        <style:tab-stops>
          <style:tab-stop style:position="14.503cm" style:leader-style="solid" style:leader-text="_"/>
        </style:tab-stops>
      </style:paragraph-properties>
      <style:text-properties officeooo:paragraph-rsid="002b237c"/>
    </style:style>
    <style:style style:name="P58" style:family="paragraph" style:parent-style-name="Heading_20_1">
      <style:text-properties style:font-name="Aptos Display" fo:font-weight="normal" officeooo:rsid="0025b8b9" officeooo:paragraph-rsid="002b237c" style:font-weight-asian="normal" style:font-weight-complex="normal"/>
    </style:style>
    <style:style style:name="P59" style:family="paragraph" style:parent-style-name="Standard">
      <style:text-properties style:font-name="Times New Roman" fo:font-size="16pt" officeooo:paragraph-rsid="002b237c" style:font-size-asian="16pt" style:font-name-complex="Times New Roman1" style:font-size-complex="16pt"/>
    </style:style>
    <style:style style:name="P60" style:family="paragraph" style:parent-style-name="Standard">
      <style:paragraph-properties fo:margin-top="0cm" fo:margin-bottom="0.282cm" style:contextual-spacing="false" fo:line-height="150%" fo:text-align="justify" style:justify-single-word="false" fo:break-before="page" loext:word-spacing-minimum="75%" loext:word-spacing-maximum="133%"/>
      <style:text-properties style:font-name="Times New Roman" fo:font-size="16pt" style:font-size-asian="16pt" style:font-name-complex="Times New Roman1" style:font-size-complex="16pt"/>
    </style:style>
    <style:style style:name="P61" style:family="paragraph" style:parent-style-name="Heading_20_1">
      <style:paragraph-properties fo:line-height="100%" fo:text-align="justify" style:justify-single-word="false" loext:word-spacing-minimum="75%" loext:word-spacing-maximum="133%"/>
      <style:text-properties fo:color="#000000" loext:opacity="100%" style:font-name="Times New Roman" fo:font-size="24pt" style:font-size-asian="24pt" style:font-name-complex="Times New Roman1" style:font-size-complex="24pt">
        <loext:char-complex-color loext:theme-type="dark1" loext:color-type="theme"/>
      </style:text-properties>
    </style:style>
    <style:style style:name="P62" style:family="paragraph" style:parent-style-name="Standard">
      <style:paragraph-properties fo:line-height="100%" fo:text-align="justify" style:justify-single-word="false" loext:word-spacing-minimum="75%" loext:word-spacing-maximum="133%"/>
      <style:text-properties fo:color="#000000" loext:opacity="100%" style:font-name="Times New Roman" fo:font-size="24pt" style:font-size-asian="24pt" style:font-name-complex="Times New Roman1" style:font-size-complex="24pt">
        <loext:char-complex-color loext:theme-type="dark1" loext:color-type="theme"/>
      </style:text-properties>
    </style:style>
    <style:style style:name="P63" style:family="paragraph" style:parent-style-name="Standard">
      <style:paragraph-properties fo:line-height="100%" fo:text-align="justify" style:justify-single-word="false" loext:word-spacing-minimum="75%" loext:word-spacing-maximum="133%"/>
      <style:text-properties fo:color="#000000" loext:opacity="100%" style:font-name="Times New Roman" fo:font-size="24pt" officeooo:rsid="003e1415" officeooo:paragraph-rsid="003e1415" style:font-size-asian="24pt" style:font-name-complex="Times New Roman1" style:font-size-complex="24pt">
        <loext:char-complex-color loext:theme-type="dark1" loext:color-type="theme"/>
      </style:text-properties>
    </style:style>
    <style:style style:name="P64" style:family="paragraph" style:parent-style-name="Standard">
      <style:paragraph-properties fo:line-height="100%" fo:text-align="justify" style:justify-single-word="false" loext:word-spacing-minimum="75%" loext:word-spacing-maximum="133%">
        <style:tab-stops>
          <style:tab-stop style:position="14.503cm" style:leader-style="solid" style:leader-text="_"/>
        </style:tab-stops>
      </style:paragraph-properties>
    </style:style>
    <style:style style:name="P65" style:family="paragraph" style:parent-style-name="Standard">
      <style:paragraph-properties fo:line-height="100%" fo:text-align="justify" style:justify-single-word="false" loext:word-spacing-minimum="75%" loext:word-spacing-maximum="133%">
        <style:tab-stops>
          <style:tab-stop style:position="14.503cm" style:leader-style="solid" style:leader-text="_"/>
        </style:tab-stops>
      </style:paragraph-properties>
      <style:text-properties fo:color="#cccccc" loext:opacity="100%" style:font-name="Consolas" fo:font-size="10.5pt" fo:font-weight="normal" fo:background-color="#1f1f1f" style:font-name-complex="Arial2"/>
    </style:style>
    <style:style style:name="P66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67" style:family="paragraph" style:parent-style-name="Standard">
      <style:paragraph-properties fo:margin-top="0cm" fo:margin-bottom="0cm" style:contextual-spacing="false" style:line-height-at-least="0.503cm"/>
    </style:style>
    <style:style style:name="P68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cccccc" loext:opacity="100%" fo:background-color="#1f1f1f"/>
    </style:style>
    <style:style style:name="P69" style:family="paragraph" style:parent-style-name="Standard">
      <style:paragraph-properties fo:line-height="100%" fo:text-align="justify" style:justify-single-word="false" loext:word-spacing-minimum="75%" loext:word-spacing-maximum="133%">
        <style:tab-stops>
          <style:tab-stop style:position="14.503cm" style:leader-style="solid" style:leader-text="_"/>
        </style:tab-stops>
      </style:paragraph-properties>
      <style:text-properties officeooo:paragraph-rsid="003e1415"/>
    </style:style>
    <style:style style:name="P70" style:family="paragraph" style:parent-style-name="Standard">
      <style:paragraph-properties fo:line-height="100%" fo:text-align="justify" style:justify-single-word="false" fo:break-before="page" loext:word-spacing-minimum="75%" loext:word-spacing-maximum="133%"/>
      <style:text-properties fo:color="#000000" loext:opacity="100%" style:font-name="Times New Roman" fo:font-size="24pt" officeooo:rsid="003e1415" officeooo:paragraph-rsid="003e1415" style:font-size-asian="24pt" style:font-name-complex="Times New Roman1" style:font-size-complex="24pt">
        <loext:char-complex-color loext:theme-type="dark1" loext:color-type="theme"/>
      </style:text-properties>
    </style:style>
    <style:style style:name="P71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cccccc" loext:opacity="100%" officeooo:paragraph-rsid="003e1415" fo:background-color="#1f1f1f"/>
    </style:style>
    <style:style style:name="P72" style:family="paragraph" style:parent-style-name="Standard">
      <style:paragraph-properties fo:line-height="100%" fo:text-align="justify" style:justify-single-word="false" loext:word-spacing-minimum="75%" loext:word-spacing-maximum="133%">
        <style:tab-stops>
          <style:tab-stop style:position="14.503cm" style:leader-style="solid" style:leader-text="_"/>
        </style:tab-stops>
      </style:paragraph-properties>
      <style:text-properties style:font-name="Arial1" style:font-name-complex="Arial2"/>
    </style:style>
    <style:style style:name="P73" style:family="paragraph" style:parent-style-name="Standard">
      <style:paragraph-properties fo:margin-top="0cm" fo:margin-bottom="0.282cm" style:contextual-spacing="false" fo:break-before="page"/>
      <style:text-properties style:font-name="Arial1" style:font-name-complex="Arial2"/>
    </style:style>
    <style:style style:name="P74" style:family="paragraph" style:parent-style-name="Heading_20_1">
      <style:paragraph-properties fo:line-height="100%" fo:text-align="justify" style:justify-single-word="false" loext:word-spacing-minimum="75%" loext:word-spacing-maximum="133%"/>
    </style:style>
    <style:style style:name="P75" style:family="paragraph" style:parent-style-name="Standard">
      <style:paragraph-properties style:line-height-at-least="0.503cm"/>
    </style:style>
    <style:style style:name="P76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77" style:family="paragraph" style:parent-style-name="Standard">
      <style:paragraph-properties fo:line-height="100%" fo:text-align="justify" style:justify-single-word="false" loext:word-spacing-minimum="75%" loext:word-spacing-maximum="133%">
        <style:tab-stops>
          <style:tab-stop style:position="14.503cm" style:leader-style="solid" style:leader-text="_"/>
        </style:tab-stops>
      </style:paragraph-properties>
      <style:text-properties officeooo:paragraph-rsid="00411f71"/>
    </style:style>
    <style:style style:name="T1" style:family="text">
      <style:text-properties style:font-name="Arial1" fo:font-size="28pt" style:text-underline-style="solid" style:text-underline-width="auto" style:text-underline-color="font-color" fo:font-weight="bold" style:font-size-asian="28pt" style:font-weight-asian="bold" style:font-name-complex="Arial2" style:font-size-complex="28pt" style:font-weight-complex="bold"/>
    </style:style>
    <style:style style:name="T2" style:family="text">
      <style:text-properties style:font-name="Times New Roman" fo:font-size="16pt" style:font-size-asian="16pt" style:font-name-complex="Times New Roman1" style:font-size-complex="16pt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4" style:family="text">
      <style:text-properties style:font-name="Times New Roman" fo:font-size="16pt" style:text-underline-style="solid" style:text-underline-width="auto" style:text-underline-color="font-color" style:font-size-asian="16pt" style:font-name-complex="Times New Roman1" style:font-size-complex="16pt"/>
    </style:style>
    <style:style style:name="T5" style:family="text">
      <style:text-properties style:font-name="Times New Roman" fo:font-size="16pt" fo:font-weight="bold" officeooo:rsid="0042f66e" style:font-size-asian="16pt" style:font-weight-asian="bold" style:font-name-complex="Times New Roman1" style:font-size-complex="16pt" style:font-weight-complex="bold"/>
    </style:style>
    <style:style style:name="T6" style:family="text">
      <style:text-properties style:font-name="Times New Roman" fo:font-size="16pt" officeooo:rsid="0042f66e" style:font-size-asian="16pt" style:font-name-complex="Times New Roman1" style:font-size-complex="16pt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fo:color="#000000" loext:opacity="100%" fo:font-size="24pt" style:font-size-asian="24pt" style:font-size-complex="24pt">
        <loext:char-complex-color loext:theme-type="dark1" loext:color-type="theme"/>
      </style:text-properties>
    </style:style>
    <style:style style:name="T9" style:family="text">
      <style:text-properties style:font-name="Arial1" fo:font-size="14pt" style:font-size-asian="14pt" style:font-name-complex="Arial2" style:font-size-complex="14pt"/>
    </style:style>
    <style:style style:name="T10" style:family="text">
      <style:text-properties style:font-name="Times New Roman" fo:font-size="16pt" officeooo:rsid="001c221e" style:font-size-asian="16pt" style:font-name-complex="Times New Roman1" style:font-size-complex="16pt"/>
    </style:style>
    <style:style style:name="T11" style:family="text">
      <style:text-properties style:font-name="Times New Roman" fo:font-size="16pt" style:text-underline-style="solid" style:text-underline-width="auto" style:text-underline-color="font-color" officeooo:rsid="001c221e" style:font-size-asian="16pt" style:font-name-complex="Times New Roman1" style:font-size-complex="16pt"/>
    </style:style>
    <style:style style:name="T12" style:family="text">
      <style:text-properties officeooo:rsid="001ef04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loext:opacity="100%" fo:font-size="24pt" style:font-size-asian="24pt" style:font-name-complex="Times New Roman1" style:font-size-complex="24pt">
        <loext:char-complex-color loext:theme-type="dark1" loext:color-type="theme"/>
      </style:text-properties>
    </style:style>
    <style:style style:name="T15" style:family="text">
      <style:text-properties fo:color="#000000" loext:opacity="100%">
        <loext:char-complex-color loext:theme-type="dark1" loext:color-type="theme"/>
      </style:text-properties>
    </style:style>
    <style:style style:name="T16" style:family="text">
      <style:text-properties fo:color="#000000" loext:opacity="100%"/>
    </style:style>
    <style:style style:name="T17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8" style:family="text">
      <style:text-properties style:font-name="Times New Roman" fo:font-size="16pt" fo:font-weight="bold" officeooo:rsid="002079dc" style:font-size-asian="16pt" style:font-weight-asian="bold" style:font-name-complex="Times New Roman1" style:font-size-complex="16pt" style:font-weight-complex="bold"/>
    </style:style>
    <style:style style:name="T19" style:family="text">
      <style:text-properties officeooo:rsid="001f0484"/>
    </style:style>
    <style:style style:name="T20" style:family="text">
      <style:text-properties fo:font-weight="bold" officeooo:rsid="0038f319" style:font-weight-asian="bold" style:font-weight-complex="bold"/>
    </style:style>
    <style:style style:name="T21" style:family="text">
      <style:text-properties style:font-name="Times New Roman" fo:font-size="24pt" style:font-size-asian="24pt" style:font-name-complex="Times New Roman1" style:font-size-complex="24pt"/>
    </style:style>
    <style:style style:name="T22" style:family="text">
      <style:text-properties officeooo:rsid="0021b27f"/>
    </style:style>
    <style:style style:name="T23" style:family="text">
      <style:text-properties style:font-name="Times New Roman" fo:font-size="16pt" officeooo:rsid="0021b27f" style:font-size-asian="16pt" style:font-name-complex="Times New Roman1" style:font-size-complex="16pt"/>
    </style:style>
    <style:style style:name="T24" style:family="text">
      <style:text-properties style:font-name="Times New Roman" fo:font-size="16pt" fo:font-weight="bold" officeooo:rsid="0021b27f" style:font-size-asian="16pt" style:font-weight-asian="bold" style:font-name-complex="Times New Roman1" style:font-size-complex="16pt" style:font-weight-complex="bold"/>
    </style:style>
    <style:style style:name="T25" style:family="text">
      <style:text-properties style:font-name="Times New Roman" fo:font-size="16pt" fo:font-weight="bold" officeooo:rsid="0038f319" style:font-size-asian="16pt" style:font-weight-asian="bold" style:font-name-complex="Times New Roman1" style:font-size-complex="16pt" style:font-weight-complex="bold"/>
    </style:style>
    <style:style style:name="T26" style:family="text">
      <style:text-properties fo:color="#000000" loext:opacity="100%" fo:font-size="24pt" officeooo:rsid="0021b27f" style:font-size-asian="24pt" style:font-name-complex="Times New Roman1" style:font-size-complex="24pt">
        <loext:char-complex-color loext:theme-type="dark1" loext:color-type="theme"/>
      </style:text-properties>
    </style:style>
    <style:style style:name="T27" style:family="text">
      <style:text-properties fo:color="#000000" loext:opacity="100%" fo:font-size="24pt" officeooo:rsid="002287e4" style:font-size-asian="24pt" style:font-name-complex="Times New Roman1" style:font-size-complex="24pt">
        <loext:char-complex-color loext:theme-type="dark1" loext:color-type="theme"/>
      </style:text-properties>
    </style:style>
    <style:style style:name="T28" style:family="text">
      <style:text-properties officeooo:rsid="002287e4"/>
    </style:style>
    <style:style style:name="T29" style:family="text">
      <style:text-properties fo:font-weight="bold" officeooo:rsid="00365368" style:font-weight-asian="bold" style:font-weight-complex="bold"/>
    </style:style>
    <style:style style:name="T30" style:family="text">
      <style:text-properties officeooo:rsid="0024608a"/>
    </style:style>
    <style:style style:name="T31" style:family="text">
      <style:text-properties officeooo:rsid="0025b8b9"/>
    </style:style>
    <style:style style:name="T32" style:family="text">
      <style:text-properties style:font-name="Times New Roman" fo:font-size="16pt" officeooo:rsid="0025b8b9" style:font-size-asian="16pt" style:font-name-complex="Times New Roman1" style:font-size-complex="16pt"/>
    </style:style>
    <style:style style:name="T33" style:family="text">
      <style:text-properties style:font-name="Times New Roman" fo:font-size="16pt" fo:font-weight="bold" officeooo:rsid="0025b8b9" style:font-size-asian="16pt" style:font-weight-asian="bold" style:font-name-complex="Times New Roman1" style:font-size-complex="16pt" style:font-weight-complex="bold"/>
    </style:style>
    <style:style style:name="T34" style:family="text">
      <style:text-properties style:font-name="Times New Roman" fo:font-size="16pt" officeooo:rsid="00291aac" style:font-size-asian="16pt" style:font-name-complex="Times New Roman1" style:font-size-complex="16pt"/>
    </style:style>
    <style:style style:name="T35" style:family="text">
      <style:text-properties style:font-name="Times New Roman" fo:font-size="16pt" fo:font-weight="bold" officeooo:rsid="00291aac" style:font-size-asian="16pt" style:font-weight-asian="bold" style:font-name-complex="Times New Roman1" style:font-size-complex="16pt" style:font-weight-complex="bold"/>
    </style:style>
    <style:style style:name="T36" style:family="text">
      <style:text-properties style:font-name="Times New Roman" fo:font-size="16pt" officeooo:rsid="00300d94" style:font-size-asian="16pt" style:font-name-complex="Times New Roman1" style:font-size-complex="16pt"/>
    </style:style>
    <style:style style:name="T37" style:family="text">
      <style:text-properties style:font-name="Times New Roman" fo:font-size="16pt" officeooo:rsid="002a3927" style:font-size-asian="16pt" style:font-name-complex="Times New Roman1" style:font-size-complex="16pt"/>
    </style:style>
    <style:style style:name="T38" style:family="text">
      <style:text-properties style:font-name="Times New Roman" fo:font-size="16pt" officeooo:rsid="002b237c" style:font-size-asian="16pt" style:font-name-complex="Times New Roman1" style:font-size-complex="16pt"/>
    </style:style>
    <style:style style:name="T39" style:family="text">
      <style:text-properties fo:color="#000000" loext:opacity="100%" fo:font-size="24pt" officeooo:rsid="0030f0eb" style:font-size-asian="24pt" style:font-name-complex="Times New Roman1" style:font-size-complex="24pt">
        <loext:char-complex-color loext:theme-type="dark1" loext:color-type="theme"/>
      </style:text-properties>
    </style:style>
    <style:style style:name="T40" style:family="text">
      <style:text-properties officeooo:rsid="003ec571"/>
    </style:style>
    <style:style style:name="T41" style:family="text">
      <style:text-properties style:font-name="Times New Roman" fo:font-size="16pt" fo:font-weight="normal" style:font-size-asian="16pt" style:font-weight-asian="normal" style:font-name-complex="Times New Roman1" style:font-size-complex="16pt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officeooo:rsid="002b50c9"/>
    </style:style>
    <style:style style:name="T44" style:family="text">
      <style:text-properties officeooo:rsid="002713b4"/>
    </style:style>
    <style:style style:name="T45" style:family="text">
      <style:text-properties fo:font-weight="bold" officeooo:rsid="002713b4" style:font-weight-asian="bold" style:font-weight-complex="bold"/>
    </style:style>
    <style:style style:name="T46" style:family="text">
      <style:text-properties fo:color="#000000" loext:opacity="100%" style:font-name="Times New Roman" fo:font-size="24pt" style:font-size-asian="24pt" style:font-name-complex="Times New Roman1" style:font-size-complex="24pt">
        <loext:char-complex-color loext:theme-type="dark1" loext:color-type="theme"/>
      </style:text-properties>
    </style:style>
    <style:style style:name="T47" style:family="text">
      <style:text-properties style:font-name="Arial1" style:font-name-complex="Arial2"/>
    </style:style>
    <style:style style:name="T48" style:family="text">
      <style:text-properties fo:color="#808080" loext:opacity="100%" style:font-name="Arial1"/>
    </style:style>
    <style:style style:name="T49" style:family="text">
      <style:text-properties fo:color="#569cd6" loext:opacity="100%" style:font-name="Arial1"/>
    </style:style>
    <style:style style:name="T50" style:family="text">
      <style:text-properties style:font-name="Arial1"/>
    </style:style>
    <style:style style:name="T51" style:family="text">
      <style:text-properties fo:color="#9cdcfe" loext:opacity="100%" style:font-name="Arial1"/>
    </style:style>
    <style:style style:name="T52" style:family="text">
      <style:text-properties fo:color="#808080" loext:opacity="100%"/>
    </style:style>
    <style:style style:name="T53" style:family="text">
      <style:text-properties fo:color="#569cd6" loext:opacity="100%"/>
    </style:style>
    <style:style style:name="T54" style:family="text">
      <style:text-properties fo:color="#9cdcfe" loext:opacity="100%"/>
    </style:style>
    <style:style style:name="T55" style:family="text">
      <style:text-properties fo:color="#ce9178" loext:opacity="100%"/>
    </style:style>
    <style:style style:name="T56" style:family="text">
      <style:text-properties fo:color="#808080" loext:opacity="100%" style:font-name="Consolas" fo:font-size="10.5pt" fo:font-weight="normal"/>
    </style:style>
    <style:style style:name="T57" style:family="text">
      <style:text-properties fo:color="#569cd6" loext:opacity="100%" style:font-name="Consolas" fo:font-size="10.5pt" fo:font-weight="normal"/>
    </style:style>
    <style:style style:name="T58" style:family="text">
      <style:text-properties style:font-name="Consolas" fo:font-size="10.5pt" fo:font-weight="normal"/>
    </style:style>
    <style:style style:name="T59" style:family="text">
      <style:text-properties fo:color="#9cdcfe" loext:opacity="100%" style:font-name="Consolas" fo:font-size="10.5pt" fo:font-weight="normal"/>
    </style:style>
    <style:style style:name="T60" style:family="text">
      <style:text-properties fo:color="#ce9178" loext:opacity="100%" style:font-name="Consolas" fo:font-size="10.5pt" fo:font-weight="normal"/>
    </style:style>
    <style:style style:name="T61" style:family="text">
      <style:text-properties fo:color="#b5cea8" loext:opacity="100%" style:font-name="Consolas" fo:font-size="10.5pt" fo:font-weight="normal"/>
    </style:style>
    <style:style style:name="T62" style:family="text">
      <style:text-properties fo:color="#d7ba7d" loext:opacity="100%"/>
    </style:style>
    <style:style style:name="T63" style:family="text">
      <style:text-properties fo:color="#dcdcaa" loext:opacity="100%" style:font-name="Consolas" fo:font-size="10.5pt" fo:font-weight="normal"/>
    </style:style>
    <style:style style:name="T64" style:family="text">
      <style:text-properties fo:color="#d4d4d4" loext:opacity="100%"/>
    </style:style>
    <style:style style:name="T65" style:family="text">
      <style:text-properties fo:color="#c586c0" loext:opacity="100%"/>
    </style:style>
    <style:style style:name="T66" style:family="text">
      <style:text-properties fo:color="#b5cea8" loext:opacity="100%"/>
    </style:style>
    <style:style style:name="T67" style:family="text">
      <style:text-properties fo:color="#d7ba7d" loext:opacity="100%" style:font-name="Consolas" fo:font-size="10.5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Página Web Redes Locales y Sistemas Operativos</text:span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3" loext:marker-style-name="T2"><text:span text:style-name="T3">Alumno: </text:span><text:span text:style-name="T2">Kristian Angelov Lyubomirov</text:span></text:p>
      <text:p text:style-name="P3" loext:marker-style-name="T2"><text:span text:style-name="T3">Profesor:</text:span><text:span text:style-name="T2"> Luis María Corbella Escolar</text:span></text:p>
      <text:p text:style-name="P3" loext:marker-style-name="T2"><text:span text:style-name="T3">Curso: </text:span><text:span text:style-name="T2">1º</text:span></text:p>
      <text:p text:style-name="P3" loext:marker-style-name="T4"><text:span text:style-name="T3">Especialidad</text:span><text:span text:style-name="T2">: SMR</text:span></text:p>
      <text:p text:style-name="P3" loext:marker-style-name="T2"><text:span text:style-name="T3">Asignatura/</text:span><text:span text:style-name="T5">s</text:span><text:span text:style-name="T3">: </text:span><text:span text:style-name="T2">Aplicaciones Web, </text:span><text:span text:style-name="T6">Sistemas Operativos Monopuestos &amp; Aplicaciones Ofimáticas</text:span></text:p>
      <text:p text:style-name="P4" loext:marker-style-name="T7"><text:soft-page-break/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5">Sumario</text:p>
          </text:index-title>
          <text:p text:style-name="P6"><text:a xlink:type="simple" xlink:href="#__RefHeading___Toc7708_668617124" office:name="Box sizing: border-box" text:style-name="Index_20_Link" text:visited-style-name="Index_20_Link">Box sizing: border-box<text:tab/>1</text:a></text:p>
          <text:p text:style-name="P6"><text:a xlink:type="simple" xlink:href="#__RefHeading___Toc7710_668617124" office:name="A:Hover" text:style-name="Index_20_Link" text:visited-style-name="Index_20_Link">A:Hover<text:tab/>1</text:a></text:p>
          <text:p text:style-name="P6"><text:a xlink:type="simple" xlink:href="#__RefHeading___Toc7712_668617124" office:name="Header" text:style-name="Index_20_Link" text:visited-style-name="Index_20_Link">Header<text:tab/>2</text:a></text:p>
          <text:p text:style-name="P6"><text:a xlink:type="simple" xlink:href="#__RefHeading___Toc7714_668617124" office:name=".Menu ul" text:style-name="Index_20_Link" text:visited-style-name="Index_20_Link">.Menu ul<text:tab/>2</text:a></text:p>
          <text:p text:style-name="P6"><text:a xlink:type="simple" xlink:href="#__RefHeading___Toc7716_668617124" office:name="Hero" text:style-name="Index_20_Link" text:visited-style-name="Index_20_Link">Hero<text:tab/>3</text:a></text:p>
          <text:p text:style-name="P6"><text:a xlink:type="simple" xlink:href="#__RefHeading___Toc7718_668617124" office:name="Activo" text:style-name="Index_20_Link" text:visited-style-name="Index_20_Link">Activo<text:tab/>4</text:a></text:p>
          <text:p text:style-name="P6"><text:a xlink:type="simple" xlink:href="#__RefHeading___Toc7720_668617124" office:name="Contenedor" text:style-name="Index_20_Link" text:visited-style-name="Index_20_Link">Contenedor<text:tab/>4</text:a></text:p>
          <text:p text:style-name="P6"><text:a xlink:type="simple" xlink:href="#__RefHeading___Toc7722_668617124" office:name=".Bloque" text:style-name="Index_20_Link" text:visited-style-name="Index_20_Link">.Bloque<text:tab/>5</text:a></text:p>
          <text:p text:style-name="P6"><text:a xlink:type="simple" xlink:href="#__RefHeading___Toc7724_668617124" office:name=".Bloque img" text:style-name="Index_20_Link" text:visited-style-name="Index_20_Link">.Bloque img<text:tab/>5</text:a></text:p>
          <text:p text:style-name="P6"><text:a xlink:type="simple" xlink:href="#__RefHeading___Toc7726_668617124" office:name=".Bloque img.X" text:style-name="Index_20_Link" text:visited-style-name="Index_20_Link">.Bloque img.X<text:tab/>6</text:a></text:p>
          <text:p text:style-name="P6"><text:a xlink:type="simple" xlink:href="#__RefHeading___Toc7728_668617124" office:name="Hover en bloques" text:style-name="Index_20_Link" text:visited-style-name="Index_20_Link">Hover en bloques<text:tab/>7</text:a></text:p>
          <text:p text:style-name="P6"><text:a xlink:type="simple" xlink:href="#__RefHeading___Toc7730_668617124" office:name="Botones" text:style-name="Index_20_Link" text:visited-style-name="Index_20_Link">Botones<text:tab/>7</text:a></text:p>
          <text:p text:style-name="P6"><text:a xlink:type="simple" xlink:href="#__RefHeading___Toc7732_668617124" office:name="Footer" text:style-name="Index_20_Link" text:visited-style-name="Index_20_Link">Footer<text:tab/>8</text:a></text:p>
          <text:p text:style-name="P6"><text:a xlink:type="simple" xlink:href="#__RefHeading___Toc7734_668617124" office:name="Form" text:style-name="Index_20_Link" text:visited-style-name="Index_20_Link">Form<text:tab/>8</text:a></text:p>
          <text:p text:style-name="P6"><text:a xlink:type="simple" xlink:href="#__RefHeading___Toc7736_668617124" office:name=".BloqueForm" text:style-name="Index_20_Link" text:visited-style-name="Index_20_Link">.BloqueForm<text:tab/>9</text:a></text:p>
          <text:p text:style-name="P6"><text:a xlink:type="simple" xlink:href="#__RefHeading___Toc7738_668617124" office:name="TextArea" text:style-name="Index_20_Link" text:visited-style-name="Index_20_Link">TextArea<text:tab/>9</text:a></text:p>
          <text:p text:style-name="P6"><text:a xlink:type="simple" xlink:href="#__RefHeading___Toc7740_668617124" office:name="@Media" text:style-name="Index_20_Link" text:visited-style-name="Index_20_Link">@Media<text:tab/>10</text:a></text:p>
          <text:p text:style-name="P6"><text:a xlink:type="simple" xlink:href="#__RefHeading___Toc7742_668617124" office:name="Anexo I: Código HTML utilizado" text:style-name="Index_20_Link" text:visited-style-name="Index_20_Link">Anexo I: Código HTML utilizado<text:tab/>11</text:a></text:p>
          <text:p text:style-name="P6"><text:a xlink:type="simple" xlink:href="#__RefHeading___Toc7744_668617124" office:name="Anexo II: Código CSS utilizado" text:style-name="Index_20_Link" text:visited-style-name="Index_20_Link">Anexo II: Código CSS utilizado<text:tab/>21</text:a></text:p>
          <text:p text:style-name="P6"><text:a xlink:type="simple" xlink:href="#__RefHeading___Toc7746_668617124" office:name="Prompts utilizados:" text:style-name="Index_20_Link" text:visited-style-name="Index_20_Link">Prompts utilizados:<text:tab/>30</text:a></text:p>
          <text:p text:style-name="P6"><text:a xlink:type="simple" xlink:href="#__RefHeading___Toc7748_668617124" office:name="Preview Final de la Calculadora y Formulario" text:style-name="Index_20_Link" text:visited-style-name="Index_20_Link">Preview Final de la Calculadora y Formulario<text:tab/>31</text:a></text:p>
        </text:index-body>
      </text:table-of-content>
      <text:p text:style-name="P7" loext:marker-style-name="T7"/>
      <text:h text:style-name="P8" text:outline-level="1"><text:bookmark-start text:name="_Toc224731918"/><text:bookmark-start text:name="__RefHeading___Toc7708_668617124"/><text:span text:style-name="T8">Box sizing: border-box</text:span><text:bookmark-end text:name="_Toc224731918"/><text:bookmark-end text:name="__RefHeading___Toc7708_668617124"/></text:h>
      <text:p text:style-name="P9"><draw:frame draw:style-name="fr1" draw:name="Imagen1" text:anchor-type="char" svg:width="15cm" svg:height="3.371cm" draw:z-index="0"><draw:image xlink:href="Pictures/10000001000002FD000000AC62210B71.png" xlink:type="simple" xlink:show="embed" xlink:actuate="onLoad" draw:mime-type="image/png"/></draw:frame></text:p>
      <text:p text:style-name="P10" loext:marker-style-name="T9">Ilustración <text:sequence text:ref-name="refIllustration0" text:name="Illustration" text:formula="ooow:Illustration+1" style:num-format="1">1</text:sequence><text:s/>- Selector Universal Box Sizing: border-box</text:p>
      <text:p text:style-name="P11" loext:marker-style-name="T2"><text:span text:style-name="T10">He hecho uso </text:span><text:span text:style-name="T11">d</text:span><text:span text:style-name="T4">el</text:span><text:span text:style-name="T2"> </text:span><text:span text:style-name="T3">“Box sizing: border-box”</text:span><text:span text:style-name="T2"> para que tanto la </text:span><text:span text:style-name="T3">anchura</text:span><text:span text:style-name="T2"> como la </text:span><text:span text:style-name="T3">altura</text:span><text:span text:style-name="T2"> de un elemento incluya el </text:span><text:span text:style-name="T3">“padding”</text:span><text:span text:style-name="T2"> y el </text:span><text:span text:style-name="T3">“border”</text:span><text:span text:style-name="T2"> para evitar que otros elementos se desborden.</text:span></text:p>
      <text:p text:style-name="P12"><text:tab/></text:p>
      <text:h text:style-name="P13" text:outline-level="1"><text:bookmark-start text:name="__RefHeading___Toc7710_668617124"/><text:span text:style-name="T8">A:Hover</text:span><text:bookmark-end text:name="__RefHeading___Toc7710_668617124"/></text:h>
      <text:p text:style-name="P9"><draw:frame draw:style-name="fr1" draw:name="Imagen2" text:anchor-type="char" svg:width="15cm" svg:height="3.258cm" draw:z-index="1"><draw:image xlink:href="Pictures/10000001000003F0000000DBC1C242A9.png" xlink:type="simple" xlink:show="embed" xlink:actuate="onLoad" draw:mime-type="image/png"/></draw:frame></text:p>
      <text:p text:style-name="P10">Ilustración <text:sequence text:ref-name="refIllustration1" text:name="Illustration" text:formula="ooow:Illustration+1" style:num-format="1">2</text:sequence><text:s/>– <text:span text:style-name="T12">Hover</text:span></text:p>
      <text:p text:style-name="P14" loext:marker-style-name="T2">He asignado un color <text:span text:style-name="T13">blanco</text:span> a los <text:span text:style-name="T13">enlaces</text:span> de la página y al hacer <text:span text:style-name="T13">“hover”</text:span> sobre ellos he querido que se mantengan igual además de no tener <text:span text:style-name="T13">ninguna decoración</text:span> de texto para no romper la estética de la página.</text:p>
      <text:h text:style-name="P15" text:outline-level="1"><text:bookmark-start text:name="__RefHeading___Toc7712_668617124"/><text:span text:style-name="T14">Header</text:span><text:bookmark-end text:name="__RefHeading___Toc7712_668617124"/></text:h>
      <text:p text:style-name="P12"><text:tab/></text:p>
      <text:p text:style-name="P16"><draw:frame draw:style-name="fr1" draw:name="Imagen4" text:anchor-type="char" svg:width="15cm" svg:height="3.052cm" draw:z-index="2"><draw:image xlink:href="Pictures/10000001000003F4000000CE0DD4754E.png" xlink:type="simple" xlink:show="embed" xlink:actuate="onLoad" draw:mime-type="image/png"/></draw:frame></text:p>
      <text:p text:style-name="Caption" loext:marker-style-name="T2">Ilustración <text:sequence text:ref-name="refIllustration2" text:name="Illustration" text:formula="ooow:Illustration+1" style:num-format="1">3</text:sequence><text:s/>- <text:span text:style-name="T12">Header</text:span></text:p>
      <text:p text:style-name="P17" loext:marker-style-name="T2"><text:span text:style-name="T2">He añadido un </text:span><text:span text:style-name="T3">“Header”</text:span><text:span text:style-name="T2"> a la página en donde se distribuirán los </text:span><text:span text:style-name="T3">botones</text:span><text:span text:style-name="T2"> para navegar por esta.</text:span></text:p>
      <text:p text:style-name="P18" loext:marker-style-name="T15"><text:tab/></text:p>
      <text:h text:style-name="P19" text:outline-level="1"><text:bookmark-start text:name="__RefHeading___Toc7714_668617124"/>.<text:span text:style-name="T16">Menu ul</text:span><text:bookmark-end text:name="__RefHeading___Toc7714_668617124"/></text:h>
      <text:p text:style-name="P20"><text:tab/></text:p>
      <text:p text:style-name="P21"><draw:frame draw:style-name="fr1" draw:name="Imagen5" text:anchor-type="char" svg:width="15cm" svg:height="2.893cm" draw:z-index="3"><draw:image xlink:href="Pictures/10000001000003E3000000C07F0AD76D.png" xlink:type="simple" xlink:show="embed" xlink:actuate="onLoad" draw:mime-type="image/png"/></draw:frame></text:p>
      <text:p text:style-name="P22" loext:marker-style-name="T17">Ilustración <text:sequence text:ref-name="refIllustration3" text:name="Illustration" text:formula="ooow:Illustration+1" style:num-format="1">4</text:sequence><text:s/>- <text:span text:style-name="T12">Menu Ul</text:span></text:p>
      <text:p text:style-name="P23" loext:marker-style-name="T4"><text:span text:style-name="T2">He hecho una </text:span><text:span text:style-name="T3">lista</text:span><text:span text:style-name="T2"> de los distintos apartados que tendrá la página web y he aplicado </text:span><text:span text:style-name="T3">“display flex”</text:span><text:span text:style-name="T2"> de modo en que no sea una lista en bloque y puse un </text:span><text:span text:style-name="T3">“gap”</text:span><text:span text:style-name="T2"> (hueco) de </text:span><text:span text:style-name="T3">25px</text:span><text:span text:style-name="T2"> para los </text:span><text:span text:style-name="T3">botones</text:span><text:span text:style-name="T2">. También hice lo mismo para </text:span><text:span text:style-name="T18">cualquier otra lista de la página.</text:span></text:p>
      <text:p text:style-name="P24"><text:tab/></text:p>
      <text:h text:style-name="P25" text:outline-level="1"><text:bookmark-start text:name="__RefHeading___Toc7716_668617124"/>Hero<text:bookmark-end text:name="__RefHeading___Toc7716_668617124"/></text:h>
      <text:p text:style-name="P26"><text:tab/></text:p>
      <text:p text:style-name="P20"><draw:frame draw:style-name="fr1" draw:name="Imagen3" text:anchor-type="char" svg:width="15cm" svg:height="6.668cm" draw:z-index="4"><draw:image xlink:href="Pictures/10000001000003F2000002233179B01A.png" xlink:type="simple" xlink:show="embed" xlink:actuate="onLoad" draw:mime-type="image/png"/></draw:frame></text:p>
      <text:p text:style-name="P22">Ilustración <text:sequence text:ref-name="refIllustration4" text:name="Illustration" text:formula="ooow:Illustration+1" style:num-format="1">5</text:sequence><text:s/>- <text:span text:style-name="T19">Hero</text:span></text:p>
      <text:p text:style-name="P27" loext:marker-style-name="T2">He asignado la clase <text:span text:style-name="T13">“</text:span><text:span text:style-name="T20">Hero</text:span><text:span text:style-name="T13">”</text:span> a la imagen de <text:span text:style-name="T13">“banner”</text:span> de la página principal y he utilizado unos estilos de modo en que ocupe <text:span text:style-name="T13">todo el ancho</text:span> de la página y sirva como portada.</text:p>
      <text:p text:style-name="P28"/>
      <text:p text:style-name="P12"><text:tab/></text:p>
      <text:h text:style-name="P29" text:outline-level="1"><text:bookmark-start text:name="__RefHeading___Toc7718_668617124"/><text:span text:style-name="T14">Activo</text:span><text:bookmark-end text:name="__RefHeading___Toc7718_668617124"/></text:h>
      <text:p text:style-name="P20"><text:tab/></text:p>
      <text:p text:style-name="P21"><draw:frame draw:style-name="fr1" draw:name="Imagen6" text:anchor-type="char" svg:width="15cm" svg:height="2.35cm" draw:z-index="5"><draw:image xlink:href="Pictures/100000010000042A000000A77BB9D6D9.png" xlink:type="simple" xlink:show="embed" xlink:actuate="onLoad" draw:mime-type="image/png"/></draw:frame></text:p>
      <text:p text:style-name="P22" loext:marker-style-name="T21">Ilustración <text:sequence text:ref-name="refIllustration5" text:name="Illustration" text:formula="ooow:Illustration+1" style:num-format="1">6</text:sequence><text:s/>- <text:span text:style-name="T22">Activo</text:span></text:p>
      <text:p text:style-name="P30" loext:marker-style-name="T2"><text:span text:style-name="T2">Para referirme al apartado de la página en el que estoy, he usado la clase </text:span><text:span text:style-name="T3">“Activo”</text:span><text:span text:style-name="T2"> de modo en que cuando entre a un apartado de la página web (véase </text:span><text:span text:style-name="T3">“Redes”</text:span><text:span text:style-name="T2">) en lugar de ser un </text:span><text:span text:style-name="T3">“link”</text:span><text:span text:style-name="T2">, se convierta en un título.</text:span></text:p>
      <text:p text:style-name="P12"><text:tab/></text:p>
      <text:h text:style-name="P31" text:outline-level="1"><text:bookmark-start text:name="__RefHeading___Toc7720_668617124"/><text:span text:style-name="T14">Contenedor</text:span><text:bookmark-end text:name="__RefHeading___Toc7720_668617124"/></text:h>
      <text:p text:style-name="P20"><text:tab/></text:p>
      <text:p text:style-name="P16"><draw:frame draw:style-name="fr1" draw:name="Imagen8" text:anchor-type="char" svg:width="15cm" svg:height="1.991cm" draw:z-index="6"><draw:image xlink:href="Pictures/10000001000004250000008D8E6BB85F.png" xlink:type="simple" xlink:show="embed" xlink:actuate="onLoad" draw:mime-type="image/png"/></draw:frame></text:p>
      <text:p text:style-name="Caption">Ilustración <text:sequence text:ref-name="refIllustration6" text:name="Illustration" text:formula="ooow:Illustration+1" style:num-format="1">7</text:sequence><text:s/>- <text:span text:style-name="T22">Contenedor</text:span></text:p>
      <text:p text:style-name="P11" loext:marker-style-name="T2"><text:span text:style-name="T2">H</text:span><text:span text:style-name="T23">e hecho uso de un </text:span><text:span text:style-name="T24">&lt;</text:span><text:span text:style-name="T25">div</text:span><text:span text:style-name="T24">&gt;</text:span><text:span text:style-name="T23"> </text:span><text:span text:style-name="T24">contenedor</text:span><text:span text:style-name="T23"> para aislarlo del cuerpo principal de la página </text:span><text:span text:style-name="T24">(Body)</text:span><text:span text:style-name="T23">.</text:span></text:p>
      <text:p text:style-name="P20"><text:tab/></text:p>
      <text:p text:style-name="P32" loext:marker-style-name="T2"/>
      <text:h text:style-name="P33" text:outline-level="1"><text:bookmark-start text:name="_Toc224731925"/><text:bookmark-start text:name="__RefHeading___Toc7722_668617124"/><text:soft-page-break/><text:span text:style-name="T14">.</text:span><text:bookmark-end text:name="_Toc224731925"/><text:span text:style-name="T26">Bloque</text:span><text:bookmark-end text:name="__RefHeading___Toc7722_668617124"/></text:h>
      <text:p text:style-name="P20"><text:tab/></text:p>
      <text:p text:style-name="P16"><draw:frame draw:style-name="fr1" draw:name="Imagen9" text:anchor-type="char" svg:width="15cm" svg:height="3.134cm" draw:z-index="7"><draw:image xlink:href="Pictures/100000010000042B000000DF048308DE.png" xlink:type="simple" xlink:show="embed" xlink:actuate="onLoad" draw:mime-type="image/png"/></draw:frame></text:p>
      <text:p text:style-name="Caption">Ilustración <text:sequence text:ref-name="refIllustration7" text:name="Illustration" text:formula="ooow:Illustration+1" style:num-format="1">8</text:sequence><text:s/>- .<text:span text:style-name="T22">Bloque</text:span></text:p>
      <text:p text:style-name="P11" loext:marker-style-name="T2"><text:span text:style-name="T2">Creé </text:span><text:span text:style-name="T23">una clase para los elementos de bloque y les asigné un </text:span><text:span text:style-name="T24">“box shadow”</text:span><text:span text:style-name="T23"> para que no se vea tan plano, además de oscurecer esas sombras cuando se haga </text:span><text:span text:style-name="T24">“hover”</text:span><text:span text:style-name="T23"> con el cursor.</text:span></text:p>
      <text:p text:style-name="P20"><text:tab/></text:p>
      <text:h text:style-name="P34" text:outline-level="1"><text:bookmark-start text:name="_Toc224731926"/><text:bookmark-start text:name="__RefHeading___Toc7724_668617124"/><text:span text:style-name="T14">.</text:span><text:bookmark-end text:name="_Toc224731926"/><text:span text:style-name="T26">Bloque img</text:span><text:bookmark-end text:name="__RefHeading___Toc7724_668617124"/></text:h>
      <text:p text:style-name="P16"><draw:frame draw:style-name="fr1" draw:name="Imagen10" text:anchor-type="char" svg:width="15cm" svg:height="2.732cm" draw:z-index="8"><draw:image xlink:href="Pictures/100000010000042E000000C3B2684541.png" xlink:type="simple" xlink:show="embed" xlink:actuate="onLoad" draw:mime-type="image/png"/></draw:frame></text:p>
      <text:p text:style-name="Caption">Ilustración <text:sequence text:ref-name="refIllustration8" text:name="Illustration" text:formula="ooow:Illustration+1" style:num-format="1">9</text:sequence><text:s/>- .<text:span text:style-name="T22">Bloque img</text:span></text:p>
      <text:p text:style-name="P35" loext:marker-style-name="T4"><text:span text:style-name="T2">He hecho que las </text:span><text:span text:style-name="T3">imágenes</text:span><text:span text:style-name="T2"> de los bloques </text:span><text:span text:style-name="T3">ocupen el 100%</text:span><text:span text:style-name="T2"> de su tamaño pero les he asignado una </text:span><text:span text:style-name="T3">anchura máxima</text:span><text:span text:style-name="T2"> de </text:span><text:span text:style-name="T3">600 píxeles</text:span><text:span text:style-name="T2"> para que si la resolución de las imágenes es muy alta, no altere la estética ni funcionamiento de la página.</text:span></text:p>
      <text:p text:style-name="P36"><text:tab/></text:p>
      <text:h text:style-name="P37" text:outline-level="1"><text:bookmark-start text:name="__RefHeading___Toc7726_668617124"/><text:span text:style-name="T14">.</text:span><text:span text:style-name="T27">Bloque img.X</text:span><text:bookmark-end text:name="__RefHeading___Toc7726_668617124"/></text:h>
      <text:p text:style-name="P38"><text:tab/></text:p>
      <text:p text:style-name="Standard"/>
      <text:p text:style-name="P16"><draw:frame draw:style-name="fr1" draw:name="Imagen11" text:anchor-type="char" svg:width="15cm" svg:height="5.186cm" draw:z-index="9"><draw:image xlink:href="Pictures/100000010000043100000173E5E9F078.png" xlink:type="simple" xlink:show="embed" xlink:actuate="onLoad" draw:mime-type="image/png"/></draw:frame></text:p>
      <text:p text:style-name="Caption">Ilustración <text:sequence text:ref-name="refIllustration9" text:name="Illustration" text:formula="ooow:Illustration+1" style:num-format="1">10</text:sequence><text:s/>- .<text:span text:style-name="T28">Bloque img.X</text:span></text:p>
      <text:p text:style-name="P39" loext:marker-style-name="T3">A las <text:span text:style-name="T13">imágenes</text:span> contenidas en los <text:span text:style-name="T13">bloques</text:span> de los distintos temas de la página les he asignado un <text:span text:style-name="T13">“display block”</text:span> y un <text:span text:style-name="T13">margen automático</text:span> de modo en que queden <text:span text:style-name="T13">centradas</text:span> con respecto a los <text:span text:style-name="T13">&lt;</text:span><text:span text:style-name="T29">div</text:span><text:span text:style-name="T13">&gt;</text:span> en los que están contenidas.</text:p>
      <text:p text:style-name="P40"><text:tab/></text:p>
      <text:h text:style-name="P41" text:outline-level="1"><text:bookmark-start text:name="__RefHeading___Toc7728_668617124"/><text:span text:style-name="T14">Hover en bloques</text:span><text:bookmark-end text:name="__RefHeading___Toc7728_668617124"/></text:h>
      <text:p text:style-name="P20"><text:tab/></text:p>
      <text:p text:style-name="P16"><draw:frame draw:style-name="fr1" draw:name="Imagen12" text:anchor-type="char" svg:width="15cm" svg:height="2.041cm" draw:z-index="10"><draw:image xlink:href="Pictures/100000010000042900000091502182DC.png" xlink:type="simple" xlink:show="embed" xlink:actuate="onLoad" draw:mime-type="image/png"/></draw:frame></text:p>
      <text:p text:style-name="Caption">Ilustración <text:sequence text:ref-name="refIllustration10" text:name="Illustration" text:formula="ooow:Illustration+1" style:num-format="1">11</text:sequence><text:s/>- <text:span text:style-name="T30">Hover en bloques</text:span></text:p>
      <text:p text:style-name="P42" loext:marker-style-name="T3"><text:span text:style-name="T2">Como mencioné anteriormente, los bloques tienen un </text:span><text:span text:style-name="T3">“hover”</text:span><text:span text:style-name="T2"> y en este caso, un </text:span><text:span text:style-name="T3">“transition”</text:span><text:span text:style-name="T2"> de </text:span><text:span text:style-name="T3">0.3s</text:span><text:span text:style-name="T2"> para </text:span><text:span text:style-name="T3">suavizar</text:span><text:span text:style-name="T2"> el efecto y hacerlo más natural a la vista.</text:span></text:p>
      <text:p text:style-name="P20"><text:tab/></text:p>
      <text:h text:style-name="P43" text:outline-level="1"><text:bookmark-start text:name="__RefHeading___Toc7730_668617124"/><text:span text:style-name="T14">Botones</text:span><text:bookmark-end text:name="__RefHeading___Toc7730_668617124"/></text:h>
      <text:p text:style-name="P20"><text:tab/></text:p>
      <text:p text:style-name="P16"><draw:frame draw:style-name="fr1" draw:name="Imagen13" text:anchor-type="char" svg:width="15cm" svg:height="4.884cm" draw:z-index="13"><draw:image xlink:href="Pictures/10000001000003E900000146D609658D.png" xlink:type="simple" xlink:show="embed" xlink:actuate="onLoad" draw:mime-type="image/png"/></draw:frame></text:p>
      <text:p text:style-name="Caption">Ilustración <text:sequence text:ref-name="refIllustration11" text:name="Illustration" text:formula="ooow:Illustration+1" style:num-format="1">12</text:sequence><text:s/>- Bo<text:span text:style-name="T31">tones</text:span></text:p>
      <text:p text:style-name="P11" loext:marker-style-name="T2"><text:span text:style-name="T2">En </text:span><text:span text:style-name="T32">cuanto a los </text:span><text:span text:style-name="T33">botones</text:span><text:span text:style-name="T32">, les he establecido un </text:span><text:span text:style-name="T33">“display: inline-block”</text:span><text:span text:style-name="T32"> para hacerme más fácil </text:span><text:span text:style-name="T33">alinear</text:span><text:span text:style-name="T32"> los elementos que si usase un </text:span><text:span text:style-name="T33">“display block”</text:span><text:span text:style-name="T32"> convencional, </text:span><text:span text:style-name="T34">además de asignarles también un </text:span><text:span text:style-name="T35">“box shadow”</text:span><text:span text:style-name="T34"> para darles relieve en la página.</text:span></text:p>
      <text:p text:style-name="P44"><text:tab/></text:p>
      <text:h text:style-name="P45" text:outline-level="1"><text:bookmark-start text:name="__RefHeading___Toc7732_668617124"/><text:span text:style-name="T14">Footer</text:span><text:bookmark-end text:name="__RefHeading___Toc7732_668617124"/></text:h>
      <text:p text:style-name="P46"><text:tab/></text:p>
      <text:p text:style-name="P46"><draw:frame draw:style-name="fr2" draw:name="Marco1" text:anchor-type="char" svg:width="15cm" draw:z-index="11"><draw:text-box fo:min-height="3.193cm"><text:p text:style-name="Illustration"><draw:frame draw:style-name="fr3" draw:name="Imagen14" text:anchor-type="paragraph" svg:width="15cm" style:rel-width="100%" svg:height="3.193cm" style:rel-height="scale" draw:z-index="12"><draw:image xlink:href="Pictures/100000010000042A000000E39E4A82E2.png" xlink:type="simple" xlink:show="embed" xlink:actuate="onLoad" draw:mime-type="image/png"/></draw:frame>Ilustración <text:sequence text:ref-name="refIllustration12" text:name="Illustration" text:formula="ooow:Illustration+1" style:num-format="1">13</text:sequence><text:s/>- <text:span text:style-name="T31">Footer</text:span></text:p></draw:text-box></draw:frame></text:p>
      <text:p text:style-name="P47" loext:marker-style-name="T2"><text:span text:style-name="T32">He añadido un </text:span><text:span text:style-name="T33">footer</text:span><text:span text:style-name="T32"> con </text:span><text:span text:style-name="T33">“position: sticky”</text:span><text:span text:style-name="T32"> de modo en que aún si </text:span><text:span text:style-name="T33">“scrolleo”</text:span><text:span text:style-name="T32">, el </text:span><text:span text:style-name="T33">footer</text:span><text:span text:style-name="T32"> siempre esté al </text:span><text:span text:style-name="T36">final</text:span><text:span text:style-name="T32"> de la página.</text:span></text:p>
      <text:p text:style-name="P48"><text:tab/></text:p>
      <text:h text:style-name="P49" text:outline-level="1"><text:bookmark-start text:name="__RefHeading___Toc7734_668617124"/><text:span text:style-name="T14">Form</text:span><text:bookmark-end text:name="__RefHeading___Toc7734_668617124"/></text:h>
      <text:p text:style-name="P50"><text:tab/></text:p>
      <text:p text:style-name="P51" loext:marker-style-name="T2"><draw:frame draw:style-name="fr2" draw:name="Marco3" text:anchor-type="char" svg:width="15cm" draw:z-index="16"><draw:text-box fo:min-height="3.512cm"><text:p text:style-name="Illustration"><draw:frame draw:style-name="fr3" draw:name="Imagen16" text:anchor-type="paragraph" svg:width="15cm" style:rel-width="100%" svg:height="3.512cm" style:rel-height="scale" draw:z-index="17"><draw:image xlink:href="Pictures/1000000100000427000000F90A643E78.png" xlink:type="simple" xlink:show="embed" xlink:actuate="onLoad" draw:mime-type="image/png"/></draw:frame>Ilustración <text:sequence text:ref-name="refIllustration14" text:name="Illustration" text:formula="ooow:Illustration+1" style:num-format="1">14</text:sequence>: Form input, select, textarea</text:p></draw:text-box></draw:frame><text:span text:style-name="T34">He establecido estos estilos </text:span><text:span text:style-name="T37">en común </text:span><text:span text:style-name="T34">tanto a los </text:span><text:span text:style-name="T35">“input”</text:span><text:span text:style-name="T34">, como al </text:span><text:span text:style-name="T35">“select”</text:span><text:span text:style-name="T34"> y al </text:span><text:span text:style-name="T35">“text area”</text:span><text:span text:style-name="T34"> del </text:span><text:span text:style-name="T35">formulario</text:span><text:span text:style-name="T34"> </text:span><text:span text:style-name="T38">para que tenga una presentación más pulida.</text:span></text:p>
      <text:p text:style-name="P52"/>
      <text:p text:style-name="P50"><text:tab/></text:p>
      <text:h text:style-name="P49" text:outline-level="1"><text:bookmark-start text:name="__RefHeading___Toc7736_668617124"/><text:span text:style-name="T14">.</text:span><text:span text:style-name="T39">BloqueForm</text:span><text:bookmark-end text:name="__RefHeading___Toc7736_668617124"/></text:h>
      <text:p text:style-name="P50"><text:tab/></text:p>
      <text:p text:style-name="P50"><draw:frame draw:style-name="fr2" draw:name="Marco4" text:anchor-type="char" svg:width="15cm" draw:z-index="18"><draw:text-box fo:min-height="4.413cm"><text:p text:style-name="Illustration"><draw:frame draw:style-name="fr3" draw:name="Imagen17" text:anchor-type="paragraph" svg:width="15cm" style:rel-width="100%" svg:height="4.413cm" style:rel-height="scale" draw:z-index="19"><draw:image xlink:href="Pictures/100000010000042B0000013AE05873D0.png" xlink:type="simple" xlink:show="embed" xlink:actuate="onLoad" draw:mime-type="image/png"/></draw:frame>Ilustración <text:sequence text:ref-name="refIllustration15" text:name="Illustration" text:formula="ooow:Illustration+1" style:num-format="1">15</text:sequence>: BloqueForm</text:p></draw:text-box></draw:frame></text:p>
      <text:p text:style-name="P53" loext:marker-style-name="T2">Us<text:span text:style-name="T40">é</text:span> “<text:span text:style-name="Strong_20_Emphasis">flex”</text:span> con “<text:span text:style-name="Strong_20_Emphasis">flex-direction: column”</text:span> en el formulario para colocar todos los campos de este, uno debajo del otro y mantener una estructura limpia. Esto lo hago con el fin de que el contenedor se adapte automáticamente al tamaño del contenido, como por ejemplo cuando edito el tamaño del “<text:span text:style-name="T13">textarea”</text:span>. Además, me permite controlar fácilmente el espacio entre elementos sin repercutir en el diseño.</text:p>
      <text:p text:style-name="P54"><text:tab/></text:p>
      <text:h text:style-name="P55" text:outline-level="1"><text:bookmark-start text:name="__RefHeading___Toc7738_668617124"/><text:span text:style-name="T14">TextArea</text:span><text:bookmark-end text:name="__RefHeading___Toc7738_668617124"/></text:h>
      <text:p text:style-name="P54"><text:tab/></text:p>
      <text:p text:style-name="P56" loext:marker-style-name="T41"><draw:frame draw:style-name="fr2" draw:name="Marco5" text:anchor-type="char" svg:width="15cm" draw:z-index="20"><draw:text-box fo:min-height="1.226cm"><text:p text:style-name="Illustration"><draw:frame draw:style-name="fr3" draw:name="Imagen18" text:anchor-type="paragraph" svg:width="15cm" style:rel-width="100%" svg:height="1.226cm" style:rel-height="scale" draw:z-index="21"><draw:image xlink:href="Pictures/100000010000042700000057BA147524.png" xlink:type="simple" xlink:show="embed" xlink:actuate="onLoad" draw:mime-type="image/png"/></draw:frame>Ilustración <text:sequence text:ref-name="refIllustration16" text:name="Illustration" text:formula="ooow:Illustration+1" style:num-format="1">16</text:sequence>: Resize vertical</text:p></draw:text-box></draw:frame>He utilizado <text:span text:style-name="T13">“resize: vertical;” </text:span><text:span text:style-name="T42">en el </text:span><text:span text:style-name="T13">“textarea”</text:span><text:span text:style-name="T42"> para que </text:span><text:span text:style-name="T13">no</text:span><text:span text:style-name="T42"> permita </text:span><text:span text:style-name="T13">modificar</text:span><text:span text:style-name="T42"> el </text:span><text:span text:style-name="T13">tamaño</text:span><text:span text:style-name="T42"> en el </text:span><text:span text:style-name="T13">eje X</text:span><text:span text:style-name="T42"> de ese campo debido a que de ese modo se </text:span><text:span text:style-name="T13">desbordaría</text:span><text:span text:style-name="T42"> con respecto al cuerpo del formulario.</text:span></text:p>
      <text:p text:style-name="P57"><text:tab/></text:p>
      <text:h text:style-name="P58" text:outline-level="1"><text:bookmark-start text:name="__RefHeading___Toc7740_668617124"/><text:span text:style-name="T14">@Media</text:span><text:bookmark-end text:name="__RefHeading___Toc7740_668617124"/></text:h>
      <text:p text:style-name="P50"><text:tab/></text:p>
      <text:p text:style-name="P59" loext:marker-style-name="T2"><draw:frame draw:style-name="fr2" draw:name="Marco2" text:anchor-type="char" svg:width="15cm" draw:z-index="14"><draw:text-box fo:min-height="5.449cm"><text:p text:style-name="Illustration"><draw:frame draw:style-name="fr3" draw:name="Imagen15" text:anchor-type="paragraph" svg:width="15cm" style:rel-width="100%" svg:height="5.449cm" style:rel-height="scale" draw:z-index="15"><draw:image xlink:href="Pictures/100000010000042C000001847D5D24E1.png" xlink:type="simple" xlink:show="embed" xlink:actuate="onLoad" draw:mime-type="image/png"/></draw:frame>Ilustración <text:sequence text:ref-name="refIllustration13" text:name="Illustration" text:formula="ooow:Illustration+1" style:num-format="1">17</text:sequence>: Responsiveness</text:p></draw:text-box></draw:frame><text:span text:style-name="T43">Finalmente, he</text:span> <text:span text:style-name="T44">copiado e implementado </text:span>un <text:span text:style-name="T13">CSS</text:span> genérico con el objetivo de que la página <text:span text:style-name="T13">adapte</text:span> correctamente sus <text:span text:style-name="T13">dimensiones</text:span> a <text:span text:style-name="T13">distintos </text:span><text:span text:style-name="T45">terminales</text:span><text:span text:style-name="T44"> con el fin de tener </text:span>un diseño <text:span text:style-name="T13">“responsive”.</text:span></text:p>
      <text:p text:style-name="P60" loext:marker-style-name="T2"/>
      <text:h text:style-name="P61" text:outline-level="1" loext:marker-style-name="T46"><text:bookmark-start text:name="_Toc224731930"/><text:bookmark-start text:name="__RefHeading___Toc7742_668617124"/>Anexo I: Código HTML utilizado<text:bookmark-end text:name="_Toc224731930"/><text:bookmark-end text:name="__RefHeading___Toc7742_668617124"/></text:h>
      <text:p text:style-name="P62" loext:marker-style-name="T46"/>
      <text:p text:style-name="P63" loext:marker-style-name="T46">(1. Index)</text:p>
      <text:p text:style-name="P64"><text:tab/></text:p>
      <text:p text:style-name="P65" loext:marker-style-name="T47"><text:span text:style-name="T48">&lt;!</text:span><text:span text:style-name="T49">DOCTYPE</text:span><text:span text:style-name="T50"> </text:span><text:span text:style-name="T51">html</text:span><text:span text:style-name="T48">&gt;</text:span></text:p>
      <text:p text:style-name="P66"><text:span text:style-name="T52">&lt;</text:span><text:span text:style-name="T53">html</text:span> <text:span text:style-name="T54">lang</text:span>=<text:span text:style-name="T55">"es-ES"</text:span><text:span text:style-name="T52">&gt;</text:span></text:p>
      <text:p text:style-name="P67"/>
      <text:p text:style-name="P66"><text:span text:style-name="T52">&lt;</text:span><text:span text:style-name="T53">head</text:span><text:span text:style-name="T52">&gt;</text:span></text:p>
      <text:p text:style-name="P68">    <text:span text:style-name="T56">&lt;</text:span><text:span text:style-name="T57">meta</text:span><text:span text:style-name="T58"> </text:span><text:span text:style-name="T59">charset</text:span><text:span text:style-name="T58">=</text:span><text:span text:style-name="T60">"UTF-8"</text:span><text:span text:style-name="T56">&gt;</text:span></text:p>
      <text:p text:style-name="P68">    <text:span text:style-name="T56">&lt;</text:span><text:span text:style-name="T57">title</text:span><text:span text:style-name="T56">&gt;</text:span><text:span text:style-name="T58">Redes y Sistemas Operativos</text:span><text:span text:style-name="T56">&lt;/</text:span><text:span text:style-name="T57">title</text:span><text:span text:style-name="T56">&gt;</text:span></text:p>
      <text:p text:style-name="P68">    <text:span text:style-name="T56">&lt;</text:span><text:span text:style-name="T57">meta</text:span><text:span text:style-name="T58"> </text:span><text:span text:style-name="T59">name</text:span><text:span text:style-name="T58">=</text:span><text:span text:style-name="T60">"viewport"</text:span><text:span text:style-name="T58"> </text:span><text:span text:style-name="T59">content</text:span><text:span text:style-name="T58">=</text:span><text:span text:style-name="T60">"width=device-width, initial-scale=1.0"</text:span><text:span text:style-name="T56">&gt;</text:span></text:p>
      <text:p text:style-name="P68">    <text:span text:style-name="T56">&lt;</text:span><text:span text:style-name="T57">link</text:span><text:span text:style-name="T58"> </text:span><text:span text:style-name="T59">rel</text:span><text:span text:style-name="T58">=</text:span><text:span text:style-name="T60">"stylesheet"</text:span><text:span text:style-name="T58"> </text:span><text:span text:style-name="T59">href</text:span><text:span text:style-name="T58">=</text:span><text:span text:style-name="T60">"css/styles.css"</text:span><text:span text:style-name="T56">&gt;</text:span></text:p>
      <text:p text:style-name="P66"><text:span text:style-name="T52">&lt;/</text:span><text:span text:style-name="T53">head</text:span><text:span text:style-name="T52">&gt;</text:span></text:p>
      <text:p text:style-name="P67"/>
      <text:p text:style-name="P66"><text:span text:style-name="T52">&lt;</text:span><text:span text:style-name="T53">body</text:span><text:span text:style-name="T52">&gt;</text:span></text:p>
      <text:p text:style-name="P68">    <text:span text:style-name="T56">&lt;</text:span><text:span text:style-name="T57">header</text:span><text:span text:style-name="T56">&gt;</text:span></text:p>
      <text:p text:style-name="P68">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titulo"</text:span><text:span text:style-name="T56">&gt;</text:span></text:p>
      <text:p text:style-name="P68">            <text:span text:style-name="T56">&lt;</text:span><text:span text:style-name="T57">h1</text:span><text:span text:style-name="T56">&gt;</text:span><text:span text:style-name="T58">Redes y Sistemas Operativos</text:span><text:span text:style-name="T56">&lt;/</text:span><text:span text:style-name="T57">h1</text:span><text:span text:style-name="T56">&gt;</text:span></text:p>
      <text:p text:style-name="P68">        <text:span text:style-name="T56">&lt;/</text:span><text:span text:style-name="T57">div</text:span><text:span text:style-name="T56">&gt;</text:span></text:p>
      <text:p text:style-name="P68">        <text:span text:style-name="T56">&lt;</text:span><text:span text:style-name="T57">div</text:span><text:span text:style-name="T56">&gt;</text:span></text:p>
      <text:p text:style-name="P68">            <text:span text:style-name="T56">&lt;</text:span><text:span text:style-name="T57">ul</text:span><text:span text:style-name="T58"> </text:span><text:span text:style-name="T59">class</text:span><text:span text:style-name="T58">=</text:span><text:span text:style-name="T60">"menu"</text:span><text:span text:style-name="T56">&gt;</text:span></text:p>
      <text:p text:style-name="P68">                <text:span text:style-name="T56">&lt;</text:span><text:span text:style-name="T57">li</text:span><text:span text:style-name="T58"> </text:span><text:span text:style-name="T59">class</text:span><text:span text:style-name="T58">=</text:span><text:span text:style-name="T60">"activo"</text:span><text:span text:style-name="T56">&gt;&lt;/</text:span><text:span text:style-name="T57">a</text:span><text:span text:style-name="T56">&gt;</text:span><text:span text:style-name="T58">Inicio</text:span><text:span text:style-name="T56">&lt;/</text:span><text:span text:style-name="T57">li</text:span><text:span text:style-name="T56">&gt;</text:span></text:p>
      <text:p text:style-name="P68">                <text:span text:style-name="T56">&lt;</text:span><text:span text:style-name="T57">li</text:span><text:span text:style-name="T56">&gt;&lt;</text:span><text:span text:style-name="T57">a</text:span><text:span text:style-name="T58"> </text:span><text:span text:style-name="T59">href</text:span><text:span text:style-name="T58">=</text:span><text:span text:style-name="T60">"redes.html"</text:span><text:span text:style-name="T56">&gt;</text:span><text:span text:style-name="T58">Redes</text:span><text:span text:style-name="T56">&lt;/</text:span><text:span text:style-name="T57">a</text:span><text:span text:style-name="T56">&gt;&lt;/</text:span><text:span text:style-name="T57">li</text:span><text:span text:style-name="T56">&gt;</text:span></text:p>
      <text:p text:style-name="P68">                <text:span text:style-name="T56">&lt;</text:span><text:span text:style-name="T57">li</text:span><text:span text:style-name="T56">&gt;&lt;</text:span><text:span text:style-name="T57">a</text:span><text:span text:style-name="T58"> </text:span><text:span text:style-name="T59">href</text:span><text:span text:style-name="T58">=</text:span><text:span text:style-name="T60">"sistemas.html"</text:span><text:span text:style-name="T56">&gt;</text:span><text:span text:style-name="T58">Sistemas Operativos</text:span><text:span text:style-name="T56">&lt;/</text:span><text:span text:style-name="T57">a</text:span><text:span text:style-name="T56">&gt;&lt;/</text:span><text:span text:style-name="T57">li</text:span><text:span text:style-name="T56">&gt;</text:span></text:p>
      <text:p text:style-name="P68">                <text:span text:style-name="T56">&lt;</text:span><text:span text:style-name="T57">li</text:span><text:span text:style-name="T56">&gt;&lt;</text:span><text:span text:style-name="T57">a</text:span><text:span text:style-name="T58"> </text:span><text:span text:style-name="T59">href</text:span><text:span text:style-name="T58">=</text:span><text:span text:style-name="T60">"practicas.html"</text:span><text:span text:style-name="T56">&gt;</text:span><text:span text:style-name="T58">Prácticas</text:span><text:span text:style-name="T56">&lt;/</text:span><text:span text:style-name="T57">a</text:span><text:span text:style-name="T56">&gt;&lt;/</text:span><text:span text:style-name="T57">li</text:span><text:span text:style-name="T56">&gt;</text:span></text:p>
      <text:p text:style-name="P68">                <text:span text:style-name="T56">&lt;</text:span><text:span text:style-name="T57">li</text:span><text:span text:style-name="T56">&gt;&lt;</text:span><text:span text:style-name="T57">a</text:span><text:span text:style-name="T58"> </text:span><text:span text:style-name="T59">href</text:span><text:span text:style-name="T58">=</text:span><text:span text:style-name="T60">"contacto.html"</text:span><text:span text:style-name="T56">&gt;</text:span><text:span text:style-name="T58">Contacto</text:span><text:span text:style-name="T56">&lt;/</text:span><text:span text:style-name="T57">a</text:span><text:span text:style-name="T56">&gt;&lt;/</text:span><text:span text:style-name="T57">li</text:span><text:span text:style-name="T56">&gt;</text:span></text:p>
      <text:p text:style-name="P68">            <text:span text:style-name="T56">&lt;/</text:span><text:span text:style-name="T57">ul</text:span><text:span text:style-name="T56">&gt;</text:span></text:p>
      <text:p text:style-name="P68">        <text:span text:style-name="T56">&lt;/</text:span><text:span text:style-name="T57">div</text:span><text:span text:style-name="T56">&gt;</text:span></text:p>
      <text:p text:style-name="P68">    <text:span text:style-name="T56">&lt;/</text:span><text:span text:style-name="T57">header</text:span><text:span text:style-name="T56">&gt;</text:span></text:p>
      <text:p text:style-name="P68">    <text:span text:style-name="T56">&lt;</text:span><text:span text:style-name="T57">hr</text:span><text:span text:style-name="T56">&gt;</text:span></text:p>
      <text:p text:style-name="P67"/>
      <text:p text:style-name="P68">    <text:span text:style-name="T56">&lt;</text:span><text:span text:style-name="T57">main</text:span><text:span text:style-name="T56">&gt;</text:span></text:p>
      <text:p text:style-name="P68">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hero"</text:span><text:span text:style-name="T56">&gt;</text:span></text:p>
      <text:p text:style-name="P68">    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herotexto"</text:span><text:span text:style-name="T56">&gt;</text:span></text:p>
      <text:p text:style-name="P68">                <text:span text:style-name="T56">&lt;</text:span><text:span text:style-name="T57">h2</text:span><text:span text:style-name="T56">&gt;</text:span><text:span text:style-name="T58">Mi web de Redes y Sistemas Operativos</text:span><text:span text:style-name="T56">&lt;/</text:span><text:span text:style-name="T57">h2</text:span><text:span text:style-name="T56">&gt;</text:span></text:p>
      <text:p text:style-name="P68">                <text:span text:style-name="T56">&lt;</text:span><text:span text:style-name="T57">p</text:span><text:span text:style-name="T56">&gt;</text:span></text:p>
      <text:p text:style-name="P68">                    <text:span text:style-name="T58">Aquí encontrarás explicaciones claras y recursos</text:span></text:p>
      <text:p text:style-name="P68">                    <text:span text:style-name="T58">sobre redes de ordenadores y sistemas operativos.</text:span></text:p>
      <text:p text:style-name="P68">                <text:span text:style-name="T56">&lt;/</text:span><text:span text:style-name="T57">p</text:span><text:span text:style-name="T56">&gt;</text:span></text:p>
      <text:p text:style-name="P68">            <text:span text:style-name="T56">&lt;/</text:span><text:span text:style-name="T57">div</text:span><text:span text:style-name="T56">&gt;</text:span></text:p>
      <text:p text:style-name="P68"><text:soft-page-break/>    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heroimagen"</text:span><text:span text:style-name="T56">&gt;</text:span></text:p>
      <text:p text:style-name="P68">                <text:span text:style-name="T56">&lt;</text:span><text:span text:style-name="T57">img</text:span><text:span text:style-name="T58"> </text:span><text:span text:style-name="T59">src</text:span><text:span text:style-name="T58">=</text:span><text:span text:style-name="T60">"./img/imagenhero.jpg"</text:span><text:span text:style-name="T58"> </text:span><text:span text:style-name="T59">alt</text:span><text:span text:style-name="T58">=</text:span><text:span text:style-name="T60">"foto de redes y sistemas operativos"</text:span><text:span text:style-name="T56">&gt;</text:span></text:p>
      <text:p text:style-name="P68">            <text:span text:style-name="T56">&lt;/</text:span><text:span text:style-name="T57">div</text:span><text:span text:style-name="T56">&gt;</text:span></text:p>
      <text:p text:style-name="P68">        <text:span text:style-name="T56">&lt;/</text:span><text:span text:style-name="T57">div</text:span><text:span text:style-name="T56">&gt;</text:span></text:p>
      <text:p text:style-name="P67"/>
      <text:p text:style-name="P68">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tarjetas-inicio"</text:span><text:span text:style-name="T56">&gt;</text:span></text:p>
      <text:p text:style-name="P68">    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tarjeta"</text:span><text:span text:style-name="T56">&gt;</text:span></text:p>
      <text:p text:style-name="P68">                <text:span text:style-name="T56">&lt;</text:span><text:span text:style-name="T57">h3</text:span><text:span text:style-name="T56">&gt;</text:span><text:span text:style-name="T58">Redes</text:span><text:span text:style-name="T56">&lt;/</text:span><text:span text:style-name="T57">h3</text:span><text:span text:style-name="T56">&gt;</text:span></text:p>
      <text:p text:style-name="P68">                <text:span text:style-name="T56">&lt;</text:span><text:span text:style-name="T57">p</text:span><text:span text:style-name="T56">&gt;</text:span><text:span text:style-name="T58">Topologías, modelos OSI/TCP-IP, direccionamiento IP, dispositivos y protocolos.</text:span><text:span text:style-name="T56">&lt;/</text:span><text:span text:style-name="T57">p</text:span><text:span text:style-name="T56">&gt;</text:span></text:p>
      <text:p text:style-name="P68">                <text:span text:style-name="T56">&lt;</text:span><text:span text:style-name="T57">a</text:span><text:span text:style-name="T58"> </text:span><text:span text:style-name="T59">href</text:span><text:span text:style-name="T58">=</text:span><text:span text:style-name="T60">"redes.html"</text:span><text:span text:style-name="T58"> </text:span><text:span text:style-name="T59">class</text:span><text:span text:style-name="T58">=</text:span><text:span text:style-name="T60">"boton"</text:span><text:span text:style-name="T56">&gt;</text:span><text:span text:style-name="T58">Ver sección</text:span><text:span text:style-name="T56">&lt;/</text:span><text:span text:style-name="T57">a</text:span><text:span text:style-name="T56">&gt;</text:span></text:p>
      <text:p text:style-name="P68">            <text:span text:style-name="T56">&lt;/</text:span><text:span text:style-name="T57">div</text:span><text:span text:style-name="T56">&gt;</text:span></text:p>
      <text:p text:style-name="P67"/>
      <text:p text:style-name="P68">    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tarjeta"</text:span><text:span text:style-name="T56">&gt;</text:span></text:p>
      <text:p text:style-name="P68">                <text:span text:style-name="T56">&lt;</text:span><text:span text:style-name="T57">h3</text:span><text:span text:style-name="T56">&gt;</text:span><text:span text:style-name="T58">Sistemas Operativos</text:span><text:span text:style-name="T56">&lt;/</text:span><text:span text:style-name="T57">h3</text:span><text:span text:style-name="T56">&gt;</text:span></text:p>
      <text:p text:style-name="P68">                <text:span text:style-name="T56">&lt;</text:span><text:span text:style-name="T57">p</text:span><text:span text:style-name="T56">&gt;</text:span><text:span text:style-name="T58">Conceptos básicos, tipos de SO, procesos, memoria y sistemas de archivos.</text:span><text:span text:style-name="T56">&lt;/</text:span><text:span text:style-name="T57">p</text:span><text:span text:style-name="T56">&gt;</text:span></text:p>
      <text:p text:style-name="P68">                <text:span text:style-name="T56">&lt;</text:span><text:span text:style-name="T57">a</text:span><text:span text:style-name="T58"> </text:span><text:span text:style-name="T59">href</text:span><text:span text:style-name="T58">=</text:span><text:span text:style-name="T60">"sistemas.html"</text:span><text:span text:style-name="T58"> </text:span><text:span text:style-name="T59">class</text:span><text:span text:style-name="T58">=</text:span><text:span text:style-name="T60">"boton"</text:span><text:span text:style-name="T56">&gt;</text:span><text:span text:style-name="T58">Ver sección</text:span><text:span text:style-name="T56">&lt;/</text:span><text:span text:style-name="T57">a</text:span><text:span text:style-name="T56">&gt;</text:span></text:p>
      <text:p text:style-name="P68">            <text:span text:style-name="T56">&lt;/</text:span><text:span text:style-name="T57">div</text:span><text:span text:style-name="T56">&gt;</text:span></text:p>
      <text:p text:style-name="P67"/>
      <text:p text:style-name="P68">    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tarjeta"</text:span><text:span text:style-name="T56">&gt;</text:span></text:p>
      <text:p text:style-name="P68">                <text:span text:style-name="T56">&lt;</text:span><text:span text:style-name="T57">h3</text:span><text:span text:style-name="T56">&gt;</text:span><text:span text:style-name="T58">Prácticas</text:span><text:span text:style-name="T56">&lt;/</text:span><text:span text:style-name="T57">h3</text:span><text:span text:style-name="T56">&gt;</text:span></text:p>
      <text:p text:style-name="P68">                <text:span text:style-name="T56">&lt;</text:span><text:span text:style-name="T57">p</text:span><text:span text:style-name="T56">&gt;</text:span><text:span text:style-name="T58">Ejercicios guiados: configuración de redes, instalación de SO, usuarios y permisos.</text:span><text:span text:style-name="T56">&lt;/</text:span><text:span text:style-name="T57">p</text:span><text:span text:style-name="T56">&gt;</text:span></text:p>
      <text:p text:style-name="P68">                <text:span text:style-name="T56">&lt;</text:span><text:span text:style-name="T57">a</text:span><text:span text:style-name="T58"> </text:span><text:span text:style-name="T59">href</text:span><text:span text:style-name="T58">=</text:span><text:span text:style-name="T60">"practicas.html"</text:span><text:span text:style-name="T58"> </text:span><text:span text:style-name="T59">class</text:span><text:span text:style-name="T58">=</text:span><text:span text:style-name="T60">"boton"</text:span><text:span text:style-name="T56">&gt;</text:span><text:span text:style-name="T58">Ver sección</text:span><text:span text:style-name="T56">&lt;/</text:span><text:span text:style-name="T57">a</text:span><text:span text:style-name="T56">&gt;</text:span></text:p>
      <text:p text:style-name="P68">            <text:span text:style-name="T56">&lt;/</text:span><text:span text:style-name="T57">div</text:span><text:span text:style-name="T56">&gt;</text:span></text:p>
      <text:p text:style-name="P68">    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tarjeta"</text:span><text:span text:style-name="T56">&gt;</text:span></text:p>
      <text:p text:style-name="P68">                <text:span text:style-name="T56">&lt;</text:span><text:span text:style-name="T57">h3</text:span><text:span text:style-name="T56">&gt;</text:span><text:span text:style-name="T58">Formulario de contacto</text:span><text:span text:style-name="T56">&lt;/</text:span><text:span text:style-name="T57">h3</text:span><text:span text:style-name="T56">&gt;</text:span></text:p>
      <text:p text:style-name="P68">                <text:span text:style-name="T56">&lt;</text:span><text:span text:style-name="T57">p</text:span><text:span text:style-name="T56">&gt;</text:span><text:span text:style-name="T58">Este es un formulario para rellenar por si tiene alguna duda.</text:span><text:span text:style-name="T56">&lt;/</text:span><text:span text:style-name="T57">p</text:span><text:span text:style-name="T56">&gt;</text:span></text:p>
      <text:p text:style-name="P68">                <text:span text:style-name="T56">&lt;</text:span><text:span text:style-name="T57">a</text:span><text:span text:style-name="T58"> </text:span><text:span text:style-name="T59">href</text:span><text:span text:style-name="T58">=</text:span><text:span text:style-name="T60">"contacto.html"</text:span><text:span text:style-name="T58"> </text:span><text:span text:style-name="T59">class</text:span><text:span text:style-name="T58">=</text:span><text:span text:style-name="T60">"boton"</text:span><text:span text:style-name="T56">&gt;</text:span><text:span text:style-name="T58">Ver sección</text:span><text:span text:style-name="T56">&lt;/</text:span><text:span text:style-name="T57">a</text:span><text:span text:style-name="T56">&gt;</text:span></text:p>
      <text:p text:style-name="P68">            <text:span text:style-name="T56">&lt;/</text:span><text:span text:style-name="T57">div</text:span><text:span text:style-name="T56">&gt;</text:span></text:p>
      <text:p text:style-name="P68">        <text:span text:style-name="T56">&lt;/</text:span><text:span text:style-name="T57">div</text:span><text:span text:style-name="T56">&gt;</text:span></text:p>
      <text:p text:style-name="P68">    <text:span text:style-name="T56">&lt;/</text:span><text:span text:style-name="T57">main</text:span><text:span text:style-name="T56">&gt;</text:span></text:p>
      <text:p text:style-name="P68">    <text:span text:style-name="T56">&lt;</text:span><text:span text:style-name="T57">hr</text:span><text:span text:style-name="T56">&gt;</text:span></text:p>
      <text:p text:style-name="P68">    <text:span text:style-name="T56">&lt;</text:span><text:span text:style-name="T57">footer</text:span><text:span text:style-name="T56">&gt;</text:span></text:p>
      <text:p text:style-name="P68">        <text:span text:style-name="T56">&lt;</text:span><text:span text:style-name="T57">p</text:span><text:span text:style-name="T56">&gt;</text:span><text:span text:style-name="T57">&amp;copy;</text:span><text:span text:style-name="T58"> 2026 Redes y Sistemas Operativos · Proyecto web</text:span><text:span text:style-name="T56">&lt;/</text:span><text:span text:style-name="T57">p</text:span><text:span text:style-name="T56">&gt;</text:span></text:p>
      <text:p text:style-name="P68">    <text:span text:style-name="T56">&lt;/</text:span><text:span text:style-name="T57">footer</text:span><text:span text:style-name="T56">&gt;</text:span></text:p>
      <text:p text:style-name="P66"><text:span text:style-name="T52">&lt;/</text:span><text:span text:style-name="T53">body</text:span><text:span text:style-name="T52">&gt;</text:span></text:p>
      <text:p text:style-name="P67"/>
      <text:p text:style-name="P66"><text:span text:style-name="T52">&lt;/</text:span><text:span text:style-name="T53">html</text:span><text:span text:style-name="T52">&gt;</text:span></text:p>
      <text:p text:style-name="P69"><text:tab/></text:p>
      <text:p text:style-name="P70" loext:marker-style-name="T46">(2. Redes)</text:p>
      <text:p text:style-name="P69"><text:tab/></text:p>
      <text:p text:style-name="P65" loext:marker-style-name="T47"><text:span text:style-name="T48">&lt;!</text:span><text:span text:style-name="T49">DOCTYPE</text:span><text:span text:style-name="T50"> </text:span><text:span text:style-name="T51">html</text:span><text:span text:style-name="T48">&gt;</text:span></text:p>
      <text:p text:style-name="P66"><text:span text:style-name="T52">&lt;</text:span><text:span text:style-name="T53">html</text:span> <text:span text:style-name="T54">lang</text:span>=<text:span text:style-name="T55">"es"</text:span><text:span text:style-name="T52">&gt;</text:span></text:p>
      <text:p text:style-name="P67"/>
      <text:p text:style-name="P66"><text:span text:style-name="T52">&lt;</text:span><text:span text:style-name="T53">head</text:span><text:span text:style-name="T52">&gt;</text:span></text:p>
      <text:p text:style-name="P68">    <text:span text:style-name="T56">&lt;</text:span><text:span text:style-name="T57">meta</text:span><text:span text:style-name="T58"> </text:span><text:span text:style-name="T59">charset</text:span><text:span text:style-name="T58">=</text:span><text:span text:style-name="T60">"UTF-8"</text:span><text:span text:style-name="T56">&gt;</text:span></text:p>
      <text:p text:style-name="P68">    <text:span text:style-name="T56">&lt;</text:span><text:span text:style-name="T57">title</text:span><text:span text:style-name="T56">&gt;</text:span><text:span text:style-name="T58">Redes</text:span><text:span text:style-name="T56">&lt;/</text:span><text:span text:style-name="T57">title</text:span><text:span text:style-name="T56">&gt;</text:span></text:p>
      <text:p text:style-name="P68">    <text:span text:style-name="T56">&lt;</text:span><text:span text:style-name="T57">meta</text:span><text:span text:style-name="T58"> </text:span><text:span text:style-name="T59">name</text:span><text:span text:style-name="T58">=</text:span><text:span text:style-name="T60">"viewport"</text:span><text:span text:style-name="T58"> </text:span><text:span text:style-name="T59">content</text:span><text:span text:style-name="T58">=</text:span><text:span text:style-name="T60">"width=device-width, initial-scale=1.0"</text:span><text:span text:style-name="T56">&gt;</text:span></text:p>
      <text:p text:style-name="P68">    <text:span text:style-name="T56">&lt;</text:span><text:span text:style-name="T57">link</text:span><text:span text:style-name="T58"> </text:span><text:span text:style-name="T59">rel</text:span><text:span text:style-name="T58">=</text:span><text:span text:style-name="T60">"stylesheet"</text:span><text:span text:style-name="T58"> </text:span><text:span text:style-name="T59">href</text:span><text:span text:style-name="T58">=</text:span><text:span text:style-name="T60">"css/styles.css"</text:span><text:span text:style-name="T56">&gt;</text:span></text:p>
      <text:p text:style-name="P66"><text:span text:style-name="T52">&lt;/</text:span><text:span text:style-name="T53">head</text:span><text:span text:style-name="T52">&gt;</text:span></text:p>
      <text:p text:style-name="P67"/>
      <text:p text:style-name="P66"><text:span text:style-name="T52">&lt;</text:span><text:span text:style-name="T53">body</text:span><text:span text:style-name="T52">&gt;</text:span></text:p>
      <text:p text:style-name="P67"/>
      <text:p text:style-name="P68">    <text:span text:style-name="T56">&lt;</text:span><text:span text:style-name="T57">header</text:span><text:span text:style-name="T56">&gt;</text:span></text:p>
      <text:p text:style-name="P68">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titulo"</text:span><text:span text:style-name="T56">&gt;</text:span></text:p>
      <text:p text:style-name="P68">            <text:span text:style-name="T56">&lt;</text:span><text:span text:style-name="T57">h1</text:span><text:span text:style-name="T56">&gt;</text:span><text:span text:style-name="T58">Redes y Sistemas Operativos</text:span><text:span text:style-name="T56">&lt;/</text:span><text:span text:style-name="T57">h1</text:span><text:span text:style-name="T56">&gt;</text:span></text:p>
      <text:p text:style-name="P68">        <text:span text:style-name="T56">&lt;/</text:span><text:span text:style-name="T57">div</text:span><text:span text:style-name="T56">&gt;</text:span></text:p>
      <text:p text:style-name="P68">        <text:span text:style-name="T56">&lt;</text:span><text:span text:style-name="T57">div</text:span><text:span text:style-name="T56">&gt;</text:span></text:p>
      <text:p text:style-name="P68">            <text:span text:style-name="T56">&lt;</text:span><text:span text:style-name="T57">ul</text:span><text:span text:style-name="T58"> </text:span><text:span text:style-name="T59">class</text:span><text:span text:style-name="T58">=</text:span><text:span text:style-name="T60">"menu"</text:span><text:span text:style-name="T56">&gt;</text:span></text:p>
      <text:p text:style-name="P68">                <text:span text:style-name="T56">&lt;</text:span><text:span text:style-name="T57">li</text:span><text:span text:style-name="T56">&gt;&lt;</text:span><text:span text:style-name="T57">a</text:span><text:span text:style-name="T58"> </text:span><text:span text:style-name="T59">href</text:span><text:span text:style-name="T58">=</text:span><text:span text:style-name="T60">"index.html"</text:span><text:span text:style-name="T56">&gt;</text:span><text:span text:style-name="T58">Inicio</text:span><text:span text:style-name="T56">&lt;/</text:span><text:span text:style-name="T57">a</text:span><text:span text:style-name="T56">&gt;&lt;/</text:span><text:span text:style-name="T57">li</text:span><text:span text:style-name="T56">&gt;</text:span></text:p>
      <text:p text:style-name="P68">                <text:span text:style-name="T56">&lt;</text:span><text:span text:style-name="T57">li</text:span><text:span text:style-name="T58"> </text:span><text:span text:style-name="T59">class</text:span><text:span text:style-name="T58">=</text:span><text:span text:style-name="T60">"activo"</text:span><text:span text:style-name="T56">&gt;</text:span><text:span text:style-name="T58">Redes</text:span><text:span text:style-name="T56">&lt;/</text:span><text:span text:style-name="T57">li</text:span><text:span text:style-name="T56">&gt;</text:span></text:p>
      <text:p text:style-name="P68">                <text:span text:style-name="T56">&lt;</text:span><text:span text:style-name="T57">li</text:span><text:span text:style-name="T56">&gt;&lt;</text:span><text:span text:style-name="T57">a</text:span><text:span text:style-name="T58"> </text:span><text:span text:style-name="T59">href</text:span><text:span text:style-name="T58">=</text:span><text:span text:style-name="T60">"sistemas.html"</text:span><text:span text:style-name="T56">&gt;</text:span><text:span text:style-name="T58">Sistemas Operativos</text:span><text:span text:style-name="T56">&lt;/</text:span><text:span text:style-name="T57">a</text:span><text:span text:style-name="T56">&gt;&lt;/</text:span><text:span text:style-name="T57">li</text:span><text:span text:style-name="T56">&gt;</text:span></text:p>
      <text:p text:style-name="P68">                <text:span text:style-name="T56">&lt;</text:span><text:span text:style-name="T57">li</text:span><text:span text:style-name="T56">&gt;&lt;</text:span><text:span text:style-name="T57">a</text:span><text:span text:style-name="T58"> </text:span><text:span text:style-name="T59">href</text:span><text:span text:style-name="T58">=</text:span><text:span text:style-name="T60">"practicas.html"</text:span><text:span text:style-name="T56">&gt;</text:span><text:span text:style-name="T58">Prácticas</text:span><text:span text:style-name="T56">&lt;/</text:span><text:span text:style-name="T57">a</text:span><text:span text:style-name="T56">&gt;&lt;/</text:span><text:span text:style-name="T57">li</text:span><text:span text:style-name="T56">&gt;</text:span></text:p>
      <text:p text:style-name="P68">                <text:span text:style-name="T56">&lt;</text:span><text:span text:style-name="T57">li</text:span><text:span text:style-name="T56">&gt;&lt;</text:span><text:span text:style-name="T57">a</text:span><text:span text:style-name="T58"> </text:span><text:span text:style-name="T59">href</text:span><text:span text:style-name="T58">=</text:span><text:span text:style-name="T60">"contacto.html"</text:span><text:span text:style-name="T56">&gt;</text:span><text:span text:style-name="T58">Contacto</text:span><text:span text:style-name="T56">&lt;/</text:span><text:span text:style-name="T57">a</text:span><text:span text:style-name="T56">&gt;&lt;/</text:span><text:span text:style-name="T57">li</text:span><text:span text:style-name="T56">&gt;</text:span></text:p>
      <text:p text:style-name="P68">            <text:span text:style-name="T56">&lt;/</text:span><text:span text:style-name="T57">ul</text:span><text:span text:style-name="T56">&gt;</text:span></text:p>
      <text:p text:style-name="P68">        <text:span text:style-name="T56">&lt;/</text:span><text:span text:style-name="T57">div</text:span><text:span text:style-name="T56">&gt;</text:span></text:p>
      <text:p text:style-name="P68">    <text:span text:style-name="T56">&lt;/</text:span><text:span text:style-name="T57">header</text:span><text:span text:style-name="T56">&gt;</text:span></text:p>
      <text:p text:style-name="P68">    <text:span text:style-name="T56">&lt;</text:span><text:span text:style-name="T57">hr</text:span><text:span text:style-name="T56">&gt;</text:span></text:p>
      <text:p text:style-name="P67"/>
      <text:p text:style-name="P68">    <text:span text:style-name="T56">&lt;</text:span><text:span text:style-name="T57">main</text:span><text:span text:style-name="T56">&gt;</text:span></text:p>
      <text:p text:style-name="P67"/>
      <text:p text:style-name="P68">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contenedor"</text:span><text:span text:style-name="T56">&gt;</text:span></text:p>
      <text:p text:style-name="P68">            <text:span text:style-name="T56">&lt;</text:span><text:span text:style-name="T57">h2</text:span><text:span text:style-name="T56">&gt;</text:span><text:span text:style-name="T58">Redes de ordenadores</text:span><text:span text:style-name="T56">&lt;/</text:span><text:span text:style-name="T57">h2</text:span><text:span text:style-name="T56">&gt;</text:span></text:p>
      <text:p text:style-name="P67"/>
      <text:p text:style-name="P68">                <text:span text:style-name="T56">&lt;</text:span><text:span text:style-name="T57">p</text:span><text:span text:style-name="T56">&gt;</text:span><text:span text:style-name="T58">En esta sección aprenderás los conceptos fundamentales de las redes de ordenadores.</text:span><text:span text:style-name="T56">&lt;/</text:span><text:span text:style-name="T57">p</text:span><text:span text:style-name="T56">&gt;</text:span></text:p>
      <text:p text:style-name="P67"/>
      <text:p text:style-name="P68">    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bloque"</text:span><text:span text:style-name="T56">&gt;</text:span></text:p>
      <text:p text:style-name="P68">                <text:span text:style-name="T56">&lt;</text:span><text:span text:style-name="T57">h3</text:span><text:span text:style-name="T56">&gt;</text:span><text:span text:style-name="T58">Topologías de Red</text:span><text:span text:style-name="T56">&lt;/</text:span><text:span text:style-name="T57">h3</text:span><text:span text:style-name="T56">&gt;</text:span></text:p>
      <text:p text:style-name="P68">                <text:span text:style-name="T56">&lt;</text:span><text:span text:style-name="T57">p</text:span><text:span text:style-name="T56">&gt;</text:span><text:span text:style-name="T58">Las topologías definen la forma lógica en que se conectan los dispositivos de red: estrella, bus, anillo, malla…</text:span><text:span text:style-name="T56">&lt;/</text:span><text:span text:style-name="T57">p</text:span><text:span text:style-name="T56">&gt;</text:span></text:p>
      <text:p text:style-name="P68">                <text:span text:style-name="T56">&lt;</text:span><text:span text:style-name="T57">img</text:span><text:span text:style-name="T58"> </text:span><text:span text:style-name="T59">src</text:span><text:span text:style-name="T58">=</text:span><text:span text:style-name="T60">"./img/diagramadered.jpg"</text:span><text:span text:style-name="T58"> </text:span><text:span text:style-name="T59">alt</text:span><text:span text:style-name="T58">=</text:span><text:span text:style-name="T60">"diagrama"</text:span><text:span text:style-name="T58"> </text:span><text:span text:style-name="T59">class</text:span><text:span text:style-name="T58">=</text:span><text:span text:style-name="T60">"redesytodalapesca"</text:span><text:span text:style-name="T56">&gt;</text:span></text:p>
      <text:p text:style-name="P68">            <text:span text:style-name="T56">&lt;/</text:span><text:span text:style-name="T57">div</text:span><text:span text:style-name="T56">&gt;</text:span></text:p>
      <text:p text:style-name="P67"/>
      <text:p text:style-name="P68"><text:soft-page-break/>    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bloque"</text:span><text:span text:style-name="T56">&gt;</text:span></text:p>
      <text:p text:style-name="P68">                <text:span text:style-name="T56">&lt;</text:span><text:span text:style-name="T57">h3</text:span><text:span text:style-name="T56">&gt;</text:span><text:span text:style-name="T58">Modelo OSI y TCP/IP</text:span><text:span text:style-name="T56">&lt;/</text:span><text:span text:style-name="T57">h3</text:span><text:span text:style-name="T56">&gt;</text:span></text:p>
      <text:p text:style-name="P68">                <text:span text:style-name="T56">&lt;</text:span><text:span text:style-name="T57">p</text:span><text:span text:style-name="T56">&gt;</text:span><text:span text:style-name="T58">Estos son los modelos que explican como la información navega por internet</text:span><text:span text:style-name="T56">&lt;/</text:span><text:span text:style-name="T57">p</text:span><text:span text:style-name="T56">&gt;</text:span></text:p>
      <text:p text:style-name="P68">                <text:span text:style-name="T56">&lt;</text:span><text:span text:style-name="T57">img</text:span><text:span text:style-name="T58"> </text:span><text:span text:style-name="T59">src</text:span><text:span text:style-name="T58">=</text:span><text:span text:style-name="T60">"./img/osi.jpg"</text:span><text:span text:style-name="T58"> </text:span><text:span text:style-name="T59">alt</text:span><text:span text:style-name="T58">=</text:span><text:span text:style-name="T60">"osi"</text:span><text:span text:style-name="T58"> </text:span><text:span text:style-name="T59">class</text:span><text:span text:style-name="T58">=</text:span><text:span text:style-name="T60">"redesytodalapesca"</text:span><text:span text:style-name="T56">&gt;</text:span></text:p>
      <text:p text:style-name="P68">            <text:span text:style-name="T56">&lt;/</text:span><text:span text:style-name="T57">div</text:span><text:span text:style-name="T56">&gt;</text:span></text:p>
      <text:p text:style-name="P67"/>
      <text:p text:style-name="P68">    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bloque"</text:span><text:span text:style-name="T56">&gt;</text:span></text:p>
      <text:p text:style-name="P68">                <text:span text:style-name="T56">&lt;</text:span><text:span text:style-name="T57">h3</text:span><text:span text:style-name="T56">&gt;</text:span><text:span text:style-name="T58">Direcciones IP y Subredes</text:span><text:span text:style-name="T56">&lt;/</text:span><text:span text:style-name="T57">h3</text:span><text:span text:style-name="T56">&gt;</text:span></text:p>
      <text:p text:style-name="P68">                <text:span text:style-name="T56">&lt;</text:span><text:span text:style-name="T57">p</text:span><text:span text:style-name="T56">&gt;</text:span><text:span text:style-name="T58">Cómo se asignan direcciones lógicas, máscaras de red y cómo dividir redes.</text:span><text:span text:style-name="T56">&lt;/</text:span><text:span text:style-name="T57">p</text:span><text:span text:style-name="T56">&gt;</text:span></text:p>
      <text:p text:style-name="P68">                <text:span text:style-name="T56">&lt;</text:span><text:span text:style-name="T57">img</text:span><text:span text:style-name="T58"> </text:span><text:span text:style-name="T59">src</text:span><text:span text:style-name="T58">=</text:span><text:span text:style-name="T60">"./img/divisionredes.png"</text:span><text:span text:style-name="T58"> </text:span><text:span text:style-name="T59">alt</text:span><text:span text:style-name="T58">=</text:span><text:span text:style-name="T60">"divisionredes"</text:span><text:span text:style-name="T58"> </text:span><text:span text:style-name="T59">class</text:span><text:span text:style-name="T58">=</text:span><text:span text:style-name="T60">"redesytodalapesca"</text:span><text:span text:style-name="T56">&gt;</text:span></text:p>
      <text:p text:style-name="P68">            <text:span text:style-name="T56">&lt;/</text:span><text:span text:style-name="T57">div</text:span><text:span text:style-name="T56">&gt;</text:span></text:p>
      <text:p text:style-name="P67"/>
      <text:p text:style-name="P68">    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bloque"</text:span><text:span text:style-name="T56">&gt;</text:span></text:p>
      <text:p text:style-name="P68">                <text:span text:style-name="T56">&lt;</text:span><text:span text:style-name="T57">h3</text:span><text:span text:style-name="T56">&gt;</text:span><text:span text:style-name="T58">Dispositivos de Red</text:span><text:span text:style-name="T56">&lt;/</text:span><text:span text:style-name="T57">h3</text:span><text:span text:style-name="T56">&gt;</text:span></text:p>
      <text:p text:style-name="P68">                <text:span text:style-name="T56">&lt;</text:span><text:span text:style-name="T57">p</text:span><text:span text:style-name="T56">&gt;</text:span><text:span text:style-name="T58">Switches y routers y su función en la red.</text:span><text:span text:style-name="T56">&lt;/</text:span><text:span text:style-name="T57">p</text:span><text:span text:style-name="T56">&gt;</text:span></text:p>
      <text:p text:style-name="P68">                <text:span text:style-name="T56">&lt;</text:span><text:span text:style-name="T57">img</text:span><text:span text:style-name="T58"> </text:span><text:span text:style-name="T59">src</text:span><text:span text:style-name="T58">=</text:span><text:span text:style-name="T60">"./img/dispositivos.jpg"</text:span><text:span text:style-name="T58"> </text:span><text:span text:style-name="T59">alt</text:span><text:span text:style-name="T58">=</text:span><text:span text:style-name="T60">"dispositivos"</text:span><text:span text:style-name="T58"> </text:span><text:span text:style-name="T59">class</text:span><text:span text:style-name="T58">=</text:span><text:span text:style-name="T60">"redesytodalapesca"</text:span><text:span text:style-name="T56">&gt;</text:span></text:p>
      <text:p text:style-name="P68">            <text:span text:style-name="T56">&lt;/</text:span><text:span text:style-name="T57">div</text:span><text:span text:style-name="T56">&gt;</text:span></text:p>
      <text:p text:style-name="P67"/>
      <text:p text:style-name="P68">    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bloque"</text:span><text:span text:style-name="T56">&gt;</text:span></text:p>
      <text:p text:style-name="P68">                <text:span text:style-name="T56">&lt;</text:span><text:span text:style-name="T57">h3</text:span><text:span text:style-name="T56">&gt;</text:span><text:span text:style-name="T58">Protocolos Importantes</text:span><text:span text:style-name="T56">&lt;/</text:span><text:span text:style-name="T57">h3</text:span><text:span text:style-name="T56">&gt;</text:span></text:p>
      <text:p text:style-name="P68">                <text:span text:style-name="T56">&lt;</text:span><text:span text:style-name="T57">p</text:span><text:span text:style-name="T56">&gt;</text:span><text:span text:style-name="T58">DHCP (puerto 67 y 68), DNS (puerto 53), HTTP (puerto 80, pero con el secure socket layer es el puerto</text:span></text:p>
      <text:p text:style-name="P68">                    <text:span text:style-name="T58">443 del TCP), FTP (puerto 20 y 21), SSH (puerto 22) y otros protocolos esenciales.</text:span><text:span text:style-name="T56">&lt;/</text:span><text:span text:style-name="T57">p</text:span><text:span text:style-name="T56">&gt;</text:span></text:p>
      <text:p text:style-name="P68">                    <text:span text:style-name="T56">&lt;</text:span><text:span text:style-name="T57">img</text:span><text:span text:style-name="T58"> </text:span><text:span text:style-name="T59">src</text:span><text:span text:style-name="T58">=</text:span><text:span text:style-name="T60">"./img/protocolos.jpg"</text:span><text:span text:style-name="T58"> </text:span><text:span text:style-name="T59">alt</text:span><text:span text:style-name="T58">=</text:span><text:span text:style-name="T60">"protocolos"</text:span><text:span text:style-name="T58"> </text:span><text:span text:style-name="T59">class</text:span><text:span text:style-name="T58">=</text:span><text:span text:style-name="T60">"redesytodalapesca"</text:span><text:span text:style-name="T56">&gt;</text:span></text:p>
      <text:p text:style-name="P68">            <text:span text:style-name="T56">&lt;/</text:span><text:span text:style-name="T57">div</text:span><text:span text:style-name="T56">&gt;</text:span></text:p>
      <text:p text:style-name="P68">        <text:span text:style-name="T56">&lt;/</text:span><text:span text:style-name="T57">div</text:span><text:span text:style-name="T56">&gt;</text:span></text:p>
      <text:p text:style-name="P67"/>
      <text:p text:style-name="P68">    <text:span text:style-name="T56">&lt;/</text:span><text:span text:style-name="T57">main</text:span><text:span text:style-name="T56">&gt;</text:span></text:p>
      <text:p text:style-name="P68">    <text:span text:style-name="T56">&lt;</text:span><text:span text:style-name="T57">hr</text:span><text:span text:style-name="T56">&gt;</text:span></text:p>
      <text:p text:style-name="P68">    <text:span text:style-name="T56">&lt;</text:span><text:span text:style-name="T57">footer</text:span><text:span text:style-name="T56">&gt;</text:span></text:p>
      <text:p text:style-name="P68">        <text:span text:style-name="T56">&lt;</text:span><text:span text:style-name="T57">p</text:span><text:span text:style-name="T56">&gt;</text:span><text:span text:style-name="T57">&amp;copy;</text:span><text:span text:style-name="T58"> 2026 Redes y Sistemas Operativos · Proyecto web</text:span><text:span text:style-name="T56">&lt;/</text:span><text:span text:style-name="T57">p</text:span><text:span text:style-name="T56">&gt;</text:span></text:p>
      <text:p text:style-name="P68">    <text:span text:style-name="T56">&lt;/</text:span><text:span text:style-name="T57">footer</text:span><text:span text:style-name="T56">&gt;</text:span></text:p>
      <text:p text:style-name="P67"/>
      <text:p text:style-name="P66"><text:span text:style-name="T52">&lt;/</text:span><text:span text:style-name="T53">body</text:span><text:span text:style-name="T52">&gt;</text:span></text:p>
      <text:p text:style-name="P67"/>
      <text:p text:style-name="P66"><text:span text:style-name="T52">&lt;/</text:span><text:span text:style-name="T53">html</text:span><text:span text:style-name="T52">&gt;</text:span></text:p>
      <text:p text:style-name="P69"><text:tab/></text:p>
      <text:p text:style-name="P70" loext:marker-style-name="T46">(3. Sistemas Operativos)</text:p>
      <text:p text:style-name="P69"><text:tab/></text:p>
      <text:p text:style-name="P65" loext:marker-style-name="T47"><text:span text:style-name="T48">&lt;!</text:span><text:span text:style-name="T49">DOCTYPE</text:span><text:span text:style-name="T50"> </text:span><text:span text:style-name="T51">html</text:span><text:span text:style-name="T48">&gt;</text:span></text:p>
      <text:p text:style-name="P66"><text:span text:style-name="T52">&lt;</text:span><text:span text:style-name="T53">html</text:span> <text:span text:style-name="T54">lang</text:span>=<text:span text:style-name="T55">"es"</text:span><text:span text:style-name="T52">&gt;</text:span></text:p>
      <text:p text:style-name="P67"/>
      <text:p text:style-name="P66"><text:span text:style-name="T52">&lt;</text:span><text:span text:style-name="T53">head</text:span><text:span text:style-name="T52">&gt;</text:span></text:p>
      <text:p text:style-name="P68">    <text:span text:style-name="T56">&lt;</text:span><text:span text:style-name="T57">meta</text:span><text:span text:style-name="T58"> </text:span><text:span text:style-name="T59">charset</text:span><text:span text:style-name="T58">=</text:span><text:span text:style-name="T60">"UTF-8"</text:span><text:span text:style-name="T56">&gt;</text:span></text:p>
      <text:p text:style-name="P68">    <text:span text:style-name="T56">&lt;</text:span><text:span text:style-name="T57">title</text:span><text:span text:style-name="T56">&gt;</text:span><text:span text:style-name="T58">Sistemas Operativos</text:span><text:span text:style-name="T56">&lt;/</text:span><text:span text:style-name="T57">title</text:span><text:span text:style-name="T56">&gt;</text:span></text:p>
      <text:p text:style-name="P68">    <text:span text:style-name="T56">&lt;</text:span><text:span text:style-name="T57">meta</text:span><text:span text:style-name="T58"> </text:span><text:span text:style-name="T59">name</text:span><text:span text:style-name="T58">=</text:span><text:span text:style-name="T60">"viewport"</text:span><text:span text:style-name="T58"> </text:span><text:span text:style-name="T59">content</text:span><text:span text:style-name="T58">=</text:span><text:span text:style-name="T60">"width=device-width, initial-scale=1.0"</text:span><text:span text:style-name="T56">&gt;</text:span></text:p>
      <text:p text:style-name="P68">    <text:span text:style-name="T56">&lt;</text:span><text:span text:style-name="T57">link</text:span><text:span text:style-name="T58"> </text:span><text:span text:style-name="T59">rel</text:span><text:span text:style-name="T58">=</text:span><text:span text:style-name="T60">"stylesheet"</text:span><text:span text:style-name="T58"> </text:span><text:span text:style-name="T59">href</text:span><text:span text:style-name="T58">=</text:span><text:span text:style-name="T60">"css/styles.css"</text:span><text:span text:style-name="T56">&gt;</text:span></text:p>
      <text:p text:style-name="P66"><text:span text:style-name="T52">&lt;/</text:span><text:span text:style-name="T53">head</text:span><text:span text:style-name="T52">&gt;</text:span></text:p>
      <text:p text:style-name="P67"/>
      <text:p text:style-name="P66"><text:span text:style-name="T52">&lt;</text:span><text:span text:style-name="T53">body</text:span><text:span text:style-name="T52">&gt;</text:span></text:p>
      <text:p text:style-name="P67"/>
      <text:p text:style-name="P68">    <text:span text:style-name="T56">&lt;</text:span><text:span text:style-name="T57">header</text:span><text:span text:style-name="T56">&gt;</text:span></text:p>
      <text:p text:style-name="P68">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titulo"</text:span><text:span text:style-name="T56">&gt;</text:span></text:p>
      <text:p text:style-name="P68">            <text:span text:style-name="T56">&lt;</text:span><text:span text:style-name="T57">h1</text:span><text:span text:style-name="T56">&gt;</text:span><text:span text:style-name="T58">Redes y Sistemas Operativos</text:span><text:span text:style-name="T56">&lt;/</text:span><text:span text:style-name="T57">h1</text:span><text:span text:style-name="T56">&gt;</text:span></text:p>
      <text:p text:style-name="P68">        <text:span text:style-name="T56">&lt;/</text:span><text:span text:style-name="T57">div</text:span><text:span text:style-name="T56">&gt;</text:span></text:p>
      <text:p text:style-name="P68">        <text:span text:style-name="T56">&lt;</text:span><text:span text:style-name="T57">div</text:span><text:span text:style-name="T56">&gt;</text:span></text:p>
      <text:p text:style-name="P68">            <text:span text:style-name="T56">&lt;</text:span><text:span text:style-name="T57">ul</text:span><text:span text:style-name="T58"> </text:span><text:span text:style-name="T59">class</text:span><text:span text:style-name="T58">=</text:span><text:span text:style-name="T60">"menu"</text:span><text:span text:style-name="T56">&gt;</text:span></text:p>
      <text:p text:style-name="P68">                <text:span text:style-name="T56">&lt;</text:span><text:span text:style-name="T57">li</text:span><text:span text:style-name="T56">&gt;&lt;</text:span><text:span text:style-name="T57">a</text:span><text:span text:style-name="T58"> </text:span><text:span text:style-name="T59">href</text:span><text:span text:style-name="T58">=</text:span><text:span text:style-name="T60">"index.html"</text:span><text:span text:style-name="T56">&gt;</text:span><text:span text:style-name="T58">Inicio</text:span><text:span text:style-name="T56">&lt;/</text:span><text:span text:style-name="T57">a</text:span><text:span text:style-name="T56">&gt;&lt;/</text:span><text:span text:style-name="T57">li</text:span><text:span text:style-name="T56">&gt;</text:span></text:p>
      <text:p text:style-name="P68">                <text:span text:style-name="T56">&lt;</text:span><text:span text:style-name="T57">li</text:span><text:span text:style-name="T56">&gt;&lt;</text:span><text:span text:style-name="T57">a</text:span><text:span text:style-name="T58"> </text:span><text:span text:style-name="T59">href</text:span><text:span text:style-name="T58">=</text:span><text:span text:style-name="T60">"redes.html"</text:span><text:span text:style-name="T56">&gt;</text:span><text:span text:style-name="T58">Redes</text:span><text:span text:style-name="T56">&lt;/</text:span><text:span text:style-name="T57">a</text:span><text:span text:style-name="T56">&gt;&lt;/</text:span><text:span text:style-name="T57">li</text:span><text:span text:style-name="T56">&gt;</text:span></text:p>
      <text:p text:style-name="P68">                <text:span text:style-name="T56">&lt;</text:span><text:span text:style-name="T57">li</text:span><text:span text:style-name="T58"> </text:span><text:span text:style-name="T59">class</text:span><text:span text:style-name="T58">=</text:span><text:span text:style-name="T60">"activo"</text:span><text:span text:style-name="T56">&gt;</text:span><text:span text:style-name="T58">Sistemas Operativos</text:span><text:span text:style-name="T56">&lt;/</text:span><text:span text:style-name="T57">li</text:span><text:span text:style-name="T56">&gt;</text:span></text:p>
      <text:p text:style-name="P68">                <text:span text:style-name="T56">&lt;</text:span><text:span text:style-name="T57">li</text:span><text:span text:style-name="T56">&gt;&lt;</text:span><text:span text:style-name="T57">a</text:span><text:span text:style-name="T58"> </text:span><text:span text:style-name="T59">href</text:span><text:span text:style-name="T58">=</text:span><text:span text:style-name="T60">"practicas.html"</text:span><text:span text:style-name="T56">&gt;</text:span><text:span text:style-name="T58">Prácticas</text:span><text:span text:style-name="T56">&lt;/</text:span><text:span text:style-name="T57">a</text:span><text:span text:style-name="T56">&gt;&lt;/</text:span><text:span text:style-name="T57">li</text:span><text:span text:style-name="T56">&gt;</text:span></text:p>
      <text:p text:style-name="P68">                <text:span text:style-name="T56">&lt;</text:span><text:span text:style-name="T57">li</text:span><text:span text:style-name="T56">&gt;&lt;</text:span><text:span text:style-name="T57">a</text:span><text:span text:style-name="T58"> </text:span><text:span text:style-name="T59">href</text:span><text:span text:style-name="T58">=</text:span><text:span text:style-name="T60">"contacto.html"</text:span><text:span text:style-name="T56">&gt;</text:span><text:span text:style-name="T58">Contacto</text:span><text:span text:style-name="T56">&lt;/</text:span><text:span text:style-name="T57">a</text:span><text:span text:style-name="T56">&gt;&lt;/</text:span><text:span text:style-name="T57">li</text:span><text:span text:style-name="T56">&gt;</text:span></text:p>
      <text:p text:style-name="P68">            <text:span text:style-name="T56">&lt;/</text:span><text:span text:style-name="T57">ul</text:span><text:span text:style-name="T56">&gt;</text:span></text:p>
      <text:p text:style-name="P68">        <text:span text:style-name="T56">&lt;/</text:span><text:span text:style-name="T57">div</text:span><text:span text:style-name="T56">&gt;</text:span></text:p>
      <text:p text:style-name="P68">    <text:span text:style-name="T56">&lt;/</text:span><text:span text:style-name="T57">header</text:span><text:span text:style-name="T56">&gt;</text:span></text:p>
      <text:p text:style-name="P68">    <text:span text:style-name="T56">&lt;</text:span><text:span text:style-name="T57">hr</text:span><text:span text:style-name="T56">&gt;</text:span></text:p>
      <text:p text:style-name="P67"/>
      <text:p text:style-name="P68">    <text:span text:style-name="T56">&lt;</text:span><text:span text:style-name="T57">main</text:span><text:span text:style-name="T56">&gt;</text:span></text:p>
      <text:p text:style-name="P67"/>
      <text:p text:style-name="P68">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contenedor"</text:span><text:span text:style-name="T56">&gt;</text:span></text:p>
      <text:p text:style-name="P68">            <text:span text:style-name="T56">&lt;</text:span><text:span text:style-name="T57">h2</text:span><text:span text:style-name="T56">&gt;</text:span><text:span text:style-name="T58">Sistemas Operativos</text:span><text:span text:style-name="T56">&lt;/</text:span><text:span text:style-name="T57">h2</text:span><text:span text:style-name="T56">&gt;</text:span></text:p>
      <text:p text:style-name="P68">            <text:span text:style-name="T56">&lt;</text:span><text:span text:style-name="T57">p</text:span><text:span text:style-name="T56">&gt;</text:span><text:span text:style-name="T58">Un sistema operativo es el software que gestiona el hardware y permite ejecutar programas.</text:span><text:span text:style-name="T56">&lt;/</text:span><text:span text:style-name="T57">p</text:span><text:span text:style-name="T56">&gt;</text:span></text:p>
      <text:p text:style-name="P67"/>
      <text:p text:style-name="P68">    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bloque"</text:span><text:span text:style-name="T56">&gt;</text:span></text:p>
      <text:p text:style-name="P68">                <text:span text:style-name="T56">&lt;</text:span><text:span text:style-name="T57">h3</text:span><text:span text:style-name="T56">&gt;</text:span><text:span text:style-name="T58">¿Qué es un Sistema Operativo?</text:span><text:span text:style-name="T56">&lt;/</text:span><text:span text:style-name="T57">h3</text:span><text:span text:style-name="T56">&gt;</text:span></text:p>
      <text:p text:style-name="P68">                <text:span text:style-name="T56">&lt;</text:span><text:span text:style-name="T57">p</text:span><text:span text:style-name="T56">&gt;</text:span><text:span text:style-name="T58">Es el software principal que controla el hardware y coordina los recursos del sistema.</text:span><text:span text:style-name="T56">&lt;/</text:span><text:span text:style-name="T57">p</text:span><text:span text:style-name="T56">&gt;</text:span></text:p>
      <text:p text:style-name="P68">                <text:span text:style-name="T56">&lt;</text:span><text:span text:style-name="T57">img</text:span><text:span text:style-name="T58"> </text:span><text:span text:style-name="T59">src</text:span><text:span text:style-name="T58">=</text:span><text:span text:style-name="T60">"./img/sistemasoperativos.jpg"</text:span><text:span text:style-name="T58"> </text:span><text:span text:style-name="T59">class</text:span><text:span text:style-name="T58">=</text:span><text:span text:style-name="T60">"sistemasbombo"</text:span><text:span text:style-name="T58"> </text:span><text:span text:style-name="T59">alt</text:span><text:span text:style-name="T58">=</text:span><text:span text:style-name="T60">"sistemasoperativos"</text:span><text:span text:style-name="T56">&gt;</text:span></text:p>
      <text:p text:style-name="P68">            <text:span text:style-name="T56">&lt;/</text:span><text:span text:style-name="T57">div</text:span><text:span text:style-name="T56">&gt;</text:span></text:p>
      <text:p text:style-name="P67"/>
      <text:p text:style-name="P71">    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bloque"</text:span><text:span text:style-name="T56">&gt;</text:span></text:p>
      <text:p text:style-name="P68"><text:soft-page-break/>                <text:span text:style-name="T56">&lt;</text:span><text:span text:style-name="T57">h3</text:span><text:span text:style-name="T56">&gt;</text:span><text:span text:style-name="T58">Tipos de Sistemas Operativos</text:span><text:span text:style-name="T56">&lt;/</text:span><text:span text:style-name="T57">h3</text:span><text:span text:style-name="T56">&gt;</text:span></text:p>
      <text:p text:style-name="P68">                <text:span text:style-name="T56">&lt;</text:span><text:span text:style-name="T57">p</text:span><text:span text:style-name="T56">&gt;</text:span><text:span text:style-name="T58">Windows, Linux, macOS, Unix, sistemas móviles, embebidos…</text:span><text:span text:style-name="T56">&lt;/</text:span><text:span text:style-name="T57">p</text:span><text:span text:style-name="T56">&gt;</text:span></text:p>
      <text:p text:style-name="P68">                <text:span text:style-name="T56">&lt;</text:span><text:span text:style-name="T57">img</text:span><text:span text:style-name="T58"> </text:span><text:span text:style-name="T59">src</text:span><text:span text:style-name="T58">=</text:span><text:span text:style-name="T60">"./img/so.jpg"</text:span><text:span text:style-name="T58"> </text:span><text:span text:style-name="T59">class</text:span><text:span text:style-name="T58">=</text:span><text:span text:style-name="T60">"sistemasbombo"</text:span><text:span text:style-name="T58"> </text:span><text:span text:style-name="T59">alt</text:span><text:span text:style-name="T58">=</text:span><text:span text:style-name="T60">"so :'3"</text:span><text:span text:style-name="T56">&gt;</text:span></text:p>
      <text:p text:style-name="P68">            <text:span text:style-name="T56">&lt;/</text:span><text:span text:style-name="T57">div</text:span><text:span text:style-name="T56">&gt;</text:span></text:p>
      <text:p text:style-name="P67"/>
      <text:p text:style-name="P68">    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bloque"</text:span><text:span text:style-name="T56">&gt;</text:span></text:p>
      <text:p text:style-name="P68">                <text:span text:style-name="T56">&lt;</text:span><text:span text:style-name="T57">h3</text:span><text:span text:style-name="T56">&gt;</text:span><text:span text:style-name="T58">Gestión de Procesos</text:span><text:span text:style-name="T56">&lt;/</text:span><text:span text:style-name="T57">h3</text:span><text:span text:style-name="T56">&gt;</text:span></text:p>
      <text:p text:style-name="P68">                <text:span text:style-name="T56">&lt;</text:span><text:span text:style-name="T57">p</text:span><text:span text:style-name="T56">&gt;</text:span><text:span text:style-name="T58">Cómo el SO crea, planifica y finaliza procesos.</text:span><text:span text:style-name="T56">&lt;/</text:span><text:span text:style-name="T57">p</text:span><text:span text:style-name="T56">&gt;</text:span></text:p>
      <text:p text:style-name="P68">                <text:span text:style-name="T56">&lt;</text:span><text:span text:style-name="T57">img</text:span><text:span text:style-name="T58"> </text:span><text:span text:style-name="T59">src</text:span><text:span text:style-name="T58">=</text:span><text:span text:style-name="T60">"./img/estados.png"</text:span><text:span text:style-name="T58"> </text:span><text:span text:style-name="T59">class</text:span><text:span text:style-name="T58">=</text:span><text:span text:style-name="T60">"sistemasbombo"</text:span><text:span text:style-name="T58"> </text:span><text:span text:style-name="T59">alt</text:span><text:span text:style-name="T58">=</text:span><text:span text:style-name="T60">"h"</text:span><text:span text:style-name="T56">&gt;</text:span></text:p>
      <text:p text:style-name="P68">            <text:span text:style-name="T56">&lt;/</text:span><text:span text:style-name="T57">div</text:span><text:span text:style-name="T56">&gt;</text:span></text:p>
      <text:p text:style-name="P67"/>
      <text:p text:style-name="P68">    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bloque"</text:span><text:span text:style-name="T56">&gt;</text:span></text:p>
      <text:p text:style-name="P68">                <text:span text:style-name="T56">&lt;</text:span><text:span text:style-name="T57">h3</text:span><text:span text:style-name="T56">&gt;</text:span><text:span text:style-name="T58">Gestión de Memoria</text:span><text:span text:style-name="T56">&lt;/</text:span><text:span text:style-name="T57">h3</text:span><text:span text:style-name="T56">&gt;</text:span></text:p>
      <text:p text:style-name="P68">                <text:span text:style-name="T56">&lt;</text:span><text:span text:style-name="T57">p</text:span><text:span text:style-name="T56">&gt;</text:span><text:span text:style-name="T58">Memoria física, virtual, paginación y segmentación.</text:span><text:span text:style-name="T56">&lt;/</text:span><text:span text:style-name="T57">p</text:span><text:span text:style-name="T56">&gt;</text:span></text:p>
      <text:p text:style-name="P68">                <text:span text:style-name="T56">&lt;</text:span><text:span text:style-name="T57">img</text:span><text:span text:style-name="T58"> </text:span><text:span text:style-name="T59">src</text:span><text:span text:style-name="T58">=</text:span><text:span text:style-name="T60">"./img/mmu.jpg"</text:span><text:span text:style-name="T58"> </text:span><text:span text:style-name="T59">class</text:span><text:span text:style-name="T58">=</text:span><text:span text:style-name="T60">"sistemasbombo"</text:span><text:span text:style-name="T58"> </text:span><text:span text:style-name="T59">alt</text:span><text:span text:style-name="T58">=</text:span><text:span text:style-name="T60">"o"</text:span><text:span text:style-name="T56">&gt;</text:span></text:p>
      <text:p text:style-name="P68">            <text:span text:style-name="T56">&lt;/</text:span><text:span text:style-name="T57">div</text:span><text:span text:style-name="T56">&gt;</text:span></text:p>
      <text:p text:style-name="P67"/>
      <text:p text:style-name="P68">    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bloque"</text:span><text:span text:style-name="T56">&gt;</text:span></text:p>
      <text:p text:style-name="P68">                <text:span text:style-name="T56">&lt;</text:span><text:span text:style-name="T57">h3</text:span><text:span text:style-name="T56">&gt;</text:span><text:span text:style-name="T58">Sistemas de Archivos</text:span><text:span text:style-name="T56">&lt;/</text:span><text:span text:style-name="T57">h3</text:span><text:span text:style-name="T56">&gt;</text:span></text:p>
      <text:p text:style-name="P68">                <text:span text:style-name="T56">&lt;</text:span><text:span text:style-name="T57">p</text:span><text:span text:style-name="T56">&gt;</text:span><text:span text:style-name="T58">NTFS, FAT32, ext4, APFS y cómo organizan los datos.</text:span><text:span text:style-name="T56">&lt;/</text:span><text:span text:style-name="T57">p</text:span><text:span text:style-name="T56">&gt;</text:span></text:p>
      <text:p text:style-name="P68">                <text:span text:style-name="T56">&lt;</text:span><text:span text:style-name="T57">img</text:span><text:span text:style-name="T58"> </text:span><text:span text:style-name="T59">src</text:span><text:span text:style-name="T58">=</text:span><text:span text:style-name="T60">"./img/sistemasarchivos.jpg"</text:span><text:span text:style-name="T58"> </text:span><text:span text:style-name="T59">class</text:span><text:span text:style-name="T58">=</text:span><text:span text:style-name="T60">"sistemasbombo"</text:span><text:span text:style-name="T58"> </text:span><text:span text:style-name="T59">alt</text:span><text:span text:style-name="T58">=</text:span><text:span text:style-name="T60">"l"</text:span><text:span text:style-name="T56">&gt;</text:span></text:p>
      <text:p text:style-name="P68">            <text:span text:style-name="T56">&lt;/</text:span><text:span text:style-name="T57">div</text:span><text:span text:style-name="T56">&gt;</text:span></text:p>
      <text:p text:style-name="P67"/>
      <text:p text:style-name="P68">    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bloque"</text:span><text:span text:style-name="T56">&gt;</text:span></text:p>
      <text:p text:style-name="P68">                <text:span text:style-name="T56">&lt;</text:span><text:span text:style-name="T57">h3</text:span><text:span text:style-name="T56">&gt;</text:span><text:span text:style-name="T58">Administración Básica</text:span><text:span text:style-name="T56">&lt;/</text:span><text:span text:style-name="T57">h3</text:span><text:span text:style-name="T56">&gt;</text:span></text:p>
      <text:p text:style-name="P68">                <text:span text:style-name="T56">&lt;</text:span><text:span text:style-name="T57">p</text:span><text:span text:style-name="T56">&gt;</text:span><text:span text:style-name="T58">Usuarios, permisos, servicios, terminal y comandos esenciales.</text:span><text:span text:style-name="T56">&lt;/</text:span><text:span text:style-name="T57">p</text:span><text:span text:style-name="T56">&gt;</text:span></text:p>
      <text:p text:style-name="P68">                <text:span text:style-name="T56">&lt;</text:span><text:span text:style-name="T57">img</text:span><text:span text:style-name="T58"> </text:span><text:span text:style-name="T59">src</text:span><text:span text:style-name="T58">=</text:span><text:span text:style-name="T60">"./img/cmd.png"</text:span><text:span text:style-name="T58"> </text:span><text:span text:style-name="T59">class</text:span><text:span text:style-name="T58">=</text:span><text:span text:style-name="T60">"sistemasbombo"</text:span><text:span text:style-name="T58"> </text:span><text:span text:style-name="T59">alt</text:span><text:span text:style-name="T58">=</text:span><text:span text:style-name="T60">"a"</text:span><text:span text:style-name="T56">&gt;</text:span></text:p>
      <text:p text:style-name="P68">            <text:span text:style-name="T56">&lt;/</text:span><text:span text:style-name="T57">div</text:span><text:span text:style-name="T56">&gt;</text:span></text:p>
      <text:p text:style-name="P68">        <text:span text:style-name="T56">&lt;/</text:span><text:span text:style-name="T57">div</text:span><text:span text:style-name="T56">&gt;</text:span></text:p>
      <text:p text:style-name="P67"/>
      <text:p text:style-name="P68">    <text:span text:style-name="T56">&lt;/</text:span><text:span text:style-name="T57">main</text:span><text:span text:style-name="T56">&gt;</text:span></text:p>
      <text:p text:style-name="P68">    <text:span text:style-name="T56">&lt;</text:span><text:span text:style-name="T57">hr</text:span><text:span text:style-name="T56">&gt;</text:span></text:p>
      <text:p text:style-name="P68">    <text:span text:style-name="T56">&lt;</text:span><text:span text:style-name="T57">footer</text:span><text:span text:style-name="T56">&gt;</text:span></text:p>
      <text:p text:style-name="P68">        <text:span text:style-name="T56">&lt;</text:span><text:span text:style-name="T57">p</text:span><text:span text:style-name="T56">&gt;</text:span><text:span text:style-name="T57">&amp;copy;</text:span><text:span text:style-name="T58"> 2026 Redes y Sistemas Operativos · Proyecto web</text:span><text:span text:style-name="T56">&lt;/</text:span><text:span text:style-name="T57">p</text:span><text:span text:style-name="T56">&gt;</text:span></text:p>
      <text:p text:style-name="P68">    <text:span text:style-name="T56">&lt;/</text:span><text:span text:style-name="T57">footer</text:span><text:span text:style-name="T56">&gt;</text:span></text:p>
      <text:p text:style-name="P67"/>
      <text:p text:style-name="P66"><text:span text:style-name="T52">&lt;/</text:span><text:span text:style-name="T53">body</text:span><text:span text:style-name="T52">&gt;</text:span></text:p>
      <text:p text:style-name="P67"/>
      <text:p text:style-name="P66"><text:span text:style-name="T52">&lt;/</text:span><text:span text:style-name="T53">html</text:span><text:span text:style-name="T52">&gt;</text:span></text:p>
      <text:p text:style-name="P69"><text:tab/></text:p>
      <text:p text:style-name="P70" loext:marker-style-name="T46">(4. Prácticas)</text:p>
      <text:p text:style-name="P69"><text:tab/></text:p>
      <text:p text:style-name="P65" loext:marker-style-name="T47"><text:span text:style-name="T48">&lt;!</text:span><text:span text:style-name="T49">DOCTYPE</text:span><text:span text:style-name="T50"> </text:span><text:span text:style-name="T51">html</text:span><text:span text:style-name="T48">&gt;</text:span></text:p>
      <text:p text:style-name="P66"><text:span text:style-name="T52">&lt;</text:span><text:span text:style-name="T53">html</text:span> <text:span text:style-name="T54">lang</text:span>=<text:span text:style-name="T55">"es"</text:span><text:span text:style-name="T52">&gt;</text:span></text:p>
      <text:p text:style-name="P67"/>
      <text:p text:style-name="P66"><text:span text:style-name="T52">&lt;</text:span><text:span text:style-name="T53">head</text:span><text:span text:style-name="T52">&gt;</text:span></text:p>
      <text:p text:style-name="P68">    <text:span text:style-name="T56">&lt;</text:span><text:span text:style-name="T57">meta</text:span><text:span text:style-name="T58"> </text:span><text:span text:style-name="T59">charset</text:span><text:span text:style-name="T58">=</text:span><text:span text:style-name="T60">"UTF-8"</text:span><text:span text:style-name="T56">&gt;</text:span></text:p>
      <text:p text:style-name="P68">    <text:span text:style-name="T56">&lt;</text:span><text:span text:style-name="T57">title</text:span><text:span text:style-name="T56">&gt;</text:span><text:span text:style-name="T58">Prácticas</text:span><text:span text:style-name="T56">&lt;/</text:span><text:span text:style-name="T57">title</text:span><text:span text:style-name="T56">&gt;</text:span></text:p>
      <text:p text:style-name="P68">    <text:span text:style-name="T56">&lt;</text:span><text:span text:style-name="T57">meta</text:span><text:span text:style-name="T58"> </text:span><text:span text:style-name="T59">name</text:span><text:span text:style-name="T58">=</text:span><text:span text:style-name="T60">"viewport"</text:span><text:span text:style-name="T58"> </text:span><text:span text:style-name="T59">content</text:span><text:span text:style-name="T58">=</text:span><text:span text:style-name="T60">"width=device-width, initial-scale=1.0"</text:span><text:span text:style-name="T56">&gt;</text:span></text:p>
      <text:p text:style-name="P68">    <text:span text:style-name="T56">&lt;</text:span><text:span text:style-name="T57">link</text:span><text:span text:style-name="T58"> </text:span><text:span text:style-name="T59">rel</text:span><text:span text:style-name="T58">=</text:span><text:span text:style-name="T60">"stylesheet"</text:span><text:span text:style-name="T58"> </text:span><text:span text:style-name="T59">href</text:span><text:span text:style-name="T58">=</text:span><text:span text:style-name="T60">"css/styles.css"</text:span><text:span text:style-name="T56">&gt;</text:span></text:p>
      <text:p text:style-name="P66"><text:span text:style-name="T52">&lt;/</text:span><text:span text:style-name="T53">head</text:span><text:span text:style-name="T52">&gt;</text:span></text:p>
      <text:p text:style-name="P67"/>
      <text:p text:style-name="P66"><text:span text:style-name="T52">&lt;</text:span><text:span text:style-name="T53">body</text:span><text:span text:style-name="T52">&gt;</text:span></text:p>
      <text:p text:style-name="P67"/>
      <text:p text:style-name="P68">    <text:span text:style-name="T56">&lt;</text:span><text:span text:style-name="T57">header</text:span><text:span text:style-name="T56">&gt;</text:span></text:p>
      <text:p text:style-name="P68">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titulo"</text:span><text:span text:style-name="T56">&gt;</text:span></text:p>
      <text:p text:style-name="P68">            <text:span text:style-name="T56">&lt;</text:span><text:span text:style-name="T57">h1</text:span><text:span text:style-name="T56">&gt;</text:span><text:span text:style-name="T58">Redes y Sistemas Operativos</text:span><text:span text:style-name="T56">&lt;/</text:span><text:span text:style-name="T57">h1</text:span><text:span text:style-name="T56">&gt;</text:span></text:p>
      <text:p text:style-name="P68">        <text:span text:style-name="T56">&lt;/</text:span><text:span text:style-name="T57">div</text:span><text:span text:style-name="T56">&gt;</text:span></text:p>
      <text:p text:style-name="P68">        <text:span text:style-name="T56">&lt;</text:span><text:span text:style-name="T57">div</text:span><text:span text:style-name="T56">&gt;</text:span></text:p>
      <text:p text:style-name="P68">            <text:span text:style-name="T56">&lt;</text:span><text:span text:style-name="T57">ul</text:span><text:span text:style-name="T58"> </text:span><text:span text:style-name="T59">class</text:span><text:span text:style-name="T58">=</text:span><text:span text:style-name="T60">"menu"</text:span><text:span text:style-name="T56">&gt;</text:span></text:p>
      <text:p text:style-name="P68">                <text:span text:style-name="T56">&lt;</text:span><text:span text:style-name="T57">li</text:span><text:span text:style-name="T56">&gt;&lt;</text:span><text:span text:style-name="T57">a</text:span><text:span text:style-name="T58"> </text:span><text:span text:style-name="T59">href</text:span><text:span text:style-name="T58">=</text:span><text:span text:style-name="T60">"index.html"</text:span><text:span text:style-name="T56">&gt;</text:span><text:span text:style-name="T58">Inicio</text:span><text:span text:style-name="T56">&lt;/</text:span><text:span text:style-name="T57">a</text:span><text:span text:style-name="T56">&gt;&lt;/</text:span><text:span text:style-name="T57">li</text:span><text:span text:style-name="T56">&gt;</text:span></text:p>
      <text:p text:style-name="P68">                <text:span text:style-name="T56">&lt;</text:span><text:span text:style-name="T57">li</text:span><text:span text:style-name="T56">&gt;&lt;</text:span><text:span text:style-name="T57">a</text:span><text:span text:style-name="T58"> </text:span><text:span text:style-name="T59">href</text:span><text:span text:style-name="T58">=</text:span><text:span text:style-name="T60">"redes.html"</text:span><text:span text:style-name="T56">&gt;</text:span><text:span text:style-name="T58">Redes</text:span><text:span text:style-name="T56">&lt;/</text:span><text:span text:style-name="T57">a</text:span><text:span text:style-name="T56">&gt;&lt;/</text:span><text:span text:style-name="T57">li</text:span><text:span text:style-name="T56">&gt;</text:span></text:p>
      <text:p text:style-name="P68">                <text:span text:style-name="T56">&lt;</text:span><text:span text:style-name="T57">li</text:span><text:span text:style-name="T56">&gt;&lt;</text:span><text:span text:style-name="T57">a</text:span><text:span text:style-name="T58"> </text:span><text:span text:style-name="T59">href</text:span><text:span text:style-name="T58">=</text:span><text:span text:style-name="T60">"sistemas.html"</text:span><text:span text:style-name="T56">&gt;</text:span><text:span text:style-name="T58">Sistemas Operativos</text:span><text:span text:style-name="T56">&lt;/</text:span><text:span text:style-name="T57">a</text:span><text:span text:style-name="T56">&gt;&lt;/</text:span><text:span text:style-name="T57">li</text:span><text:span text:style-name="T56">&gt;</text:span></text:p>
      <text:p text:style-name="P68">                <text:span text:style-name="T56">&lt;</text:span><text:span text:style-name="T57">li</text:span><text:span text:style-name="T58"> </text:span><text:span text:style-name="T59">class</text:span><text:span text:style-name="T58">=</text:span><text:span text:style-name="T60">"activo"</text:span><text:span text:style-name="T56">&gt;</text:span><text:span text:style-name="T58">Prácticas</text:span><text:span text:style-name="T56">&lt;/</text:span><text:span text:style-name="T57">li</text:span><text:span text:style-name="T56">&gt;</text:span></text:p>
      <text:p text:style-name="P68">                <text:span text:style-name="T56">&lt;</text:span><text:span text:style-name="T57">li</text:span><text:span text:style-name="T56">&gt;&lt;</text:span><text:span text:style-name="T57">a</text:span><text:span text:style-name="T58"> </text:span><text:span text:style-name="T59">href</text:span><text:span text:style-name="T58">=</text:span><text:span text:style-name="T60">"contacto.html"</text:span><text:span text:style-name="T56">&gt;</text:span><text:span text:style-name="T58">Contacto</text:span><text:span text:style-name="T56">&lt;/</text:span><text:span text:style-name="T57">a</text:span><text:span text:style-name="T56">&gt;&lt;/</text:span><text:span text:style-name="T57">li</text:span><text:span text:style-name="T56">&gt;</text:span></text:p>
      <text:p text:style-name="P68">            <text:span text:style-name="T56">&lt;/</text:span><text:span text:style-name="T57">ul</text:span><text:span text:style-name="T56">&gt;</text:span></text:p>
      <text:p text:style-name="P68">        <text:span text:style-name="T56">&lt;/</text:span><text:span text:style-name="T57">div</text:span><text:span text:style-name="T56">&gt;</text:span></text:p>
      <text:p text:style-name="P68">    <text:span text:style-name="T56">&lt;/</text:span><text:span text:style-name="T57">header</text:span><text:span text:style-name="T56">&gt;</text:span></text:p>
      <text:p text:style-name="P68">    <text:span text:style-name="T56">&lt;</text:span><text:span text:style-name="T57">hr</text:span><text:span text:style-name="T56">&gt;</text:span></text:p>
      <text:p text:style-name="P67"/>
      <text:p text:style-name="P68">    <text:span text:style-name="T56">&lt;</text:span><text:span text:style-name="T57">main</text:span><text:span text:style-name="T56">&gt;</text:span></text:p>
      <text:p text:style-name="P67"/>
      <text:p text:style-name="P68">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contenedor"</text:span><text:span text:style-name="T56">&gt;</text:span></text:p>
      <text:p text:style-name="P68">            <text:span text:style-name="T56">&lt;</text:span><text:span text:style-name="T57">h2</text:span><text:span text:style-name="T56">&gt;</text:span><text:span text:style-name="T58">Prácticas</text:span><text:span text:style-name="T56">&lt;/</text:span><text:span text:style-name="T57">h2</text:span><text:span text:style-name="T56">&gt;</text:span></text:p>
      <text:p text:style-name="P68">            <text:span text:style-name="T56">&lt;</text:span><text:span text:style-name="T57">p</text:span><text:span text:style-name="T56">&gt;</text:span><text:span text:style-name="T58">Aquí encontrarás ejercicios guiados para aplicar los conocimientos de redes y sistemas operativos.</text:span><text:span text:style-name="T56">&lt;/</text:span><text:span text:style-name="T57">p</text:span><text:span text:style-name="T56">&gt;</text:span></text:p>
      <text:p text:style-name="P67"/>
      <text:p text:style-name="P68">    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bloque"</text:span><text:span text:style-name="T56">&gt;</text:span></text:p>
      <text:p text:style-name="P68">                <text:span text:style-name="T56">&lt;</text:span><text:span text:style-name="T57">h3</text:span><text:span text:style-name="T56">&gt;</text:span><text:span text:style-name="T58">1. Configuración de una Red Local</text:span><text:span text:style-name="T56">&lt;/</text:span><text:span text:style-name="T57">h3</text:span><text:span text:style-name="T56">&gt;</text:span></text:p>
      <text:p text:style-name="P68">                <text:span text:style-name="T56">&lt;</text:span><text:span text:style-name="T57">p</text:span><text:span text:style-name="T56">&gt;</text:span><text:span text:style-name="T58">Conexión de dispositivos, asignación de IPs y pruebas de conectividad.</text:span><text:span text:style-name="T56">&lt;/</text:span><text:span text:style-name="T57">p</text:span><text:span text:style-name="T56">&gt;</text:span></text:p>
      <text:p text:style-name="P68">                <text:span text:style-name="T56">&lt;</text:span><text:span text:style-name="T57">img</text:span><text:span text:style-name="T58"> </text:span><text:span text:style-name="T59">src</text:span><text:span text:style-name="T58">=</text:span><text:span text:style-name="T60">"./img/configred.png"</text:span><text:span text:style-name="T58"> </text:span><text:span text:style-name="T59">alt</text:span><text:span text:style-name="T58">=</text:span><text:span text:style-name="T60">"configuracion_red"</text:span><text:span text:style-name="T58"> </text:span><text:span text:style-name="T59">class</text:span><text:span text:style-name="T58">=</text:span><text:span text:style-name="T60">"practicas"</text:span><text:span text:style-name="T56">&gt;</text:span></text:p>
      <text:p text:style-name="P68">            <text:span text:style-name="T56">&lt;/</text:span><text:span text:style-name="T57">div</text:span><text:span text:style-name="T56">&gt;</text:span></text:p>
      <text:p text:style-name="P67"/>
      <text:p text:style-name="P68">    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bloque"</text:span><text:span text:style-name="T56">&gt;</text:span></text:p>
      <text:p text:style-name="P68"><text:soft-page-break/>                <text:span text:style-name="T56">&lt;</text:span><text:span text:style-name="T57">h3</text:span><text:span text:style-name="T56">&gt;</text:span><text:span text:style-name="T58">2. Subredes</text:span><text:span text:style-name="T56">&lt;/</text:span><text:span text:style-name="T57">h3</text:span><text:span text:style-name="T56">&gt;</text:span></text:p>
      <text:p text:style-name="P68">                <text:span text:style-name="T56">&lt;</text:span><text:span text:style-name="T57">p</text:span><text:span text:style-name="T56">&gt;</text:span><text:span text:style-name="T58">Ejercicios para dividir redes en subredes más pequeñas.</text:span><text:span text:style-name="T56">&lt;/</text:span><text:span text:style-name="T57">p</text:span><text:span text:style-name="T56">&gt;</text:span></text:p>
      <text:p text:style-name="P68">                <text:span text:style-name="T56">&lt;</text:span><text:span text:style-name="T57">img</text:span><text:span text:style-name="T58"> </text:span><text:span text:style-name="T59">src</text:span><text:span text:style-name="T58">=</text:span><text:span text:style-name="T60">"./img/subred.png"</text:span><text:span text:style-name="T58"> </text:span><text:span text:style-name="T59">alt</text:span><text:span text:style-name="T58">=</text:span><text:span text:style-name="T60">"subredes"</text:span><text:span text:style-name="T58"> </text:span><text:span text:style-name="T59">class</text:span><text:span text:style-name="T58">=</text:span><text:span text:style-name="T60">"practicas"</text:span><text:span text:style-name="T56">&gt;</text:span></text:p>
      <text:p text:style-name="P68">            <text:span text:style-name="T56">&lt;/</text:span><text:span text:style-name="T57">div</text:span><text:span text:style-name="T56">&gt;</text:span></text:p>
      <text:p text:style-name="P67"/>
      <text:p text:style-name="P68">    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bloque"</text:span><text:span text:style-name="T56">&gt;</text:span></text:p>
      <text:p text:style-name="P68">                <text:span text:style-name="T56">&lt;</text:span><text:span text:style-name="T57">h3</text:span><text:span text:style-name="T56">&gt;</text:span><text:span text:style-name="T58">3. Instalación de Linux en una Máquina Virtual</text:span><text:span text:style-name="T56">&lt;/</text:span><text:span text:style-name="T57">h3</text:span><text:span text:style-name="T56">&gt;</text:span></text:p>
      <text:p text:style-name="P68">                <text:span text:style-name="T56">&lt;</text:span><text:span text:style-name="T57">p</text:span><text:span text:style-name="T56">&gt;</text:span><text:span text:style-name="T58">Uso de máquinas virtuales para instalar una distribución Linux.</text:span><text:span text:style-name="T56">&lt;/</text:span><text:span text:style-name="T57">p</text:span><text:span text:style-name="T56">&gt;</text:span><text:span text:style-name="T58">ç</text:span></text:p>
      <text:p text:style-name="P68">                <text:span text:style-name="T56">&lt;</text:span><text:span text:style-name="T57">img</text:span><text:span text:style-name="T58"> </text:span><text:span text:style-name="T59">src</text:span><text:span text:style-name="T58">=</text:span><text:span text:style-name="T60">"./img/instalacionubuntu.png"</text:span><text:span text:style-name="T58"> </text:span><text:span text:style-name="T59">alt</text:span><text:span text:style-name="T58">=</text:span><text:span text:style-name="T60">"instalacionubuntu"</text:span><text:span text:style-name="T58"> </text:span><text:span text:style-name="T59">class</text:span><text:span text:style-name="T58">=</text:span><text:span text:style-name="T60">"practicas"</text:span><text:span text:style-name="T56">&gt;</text:span></text:p>
      <text:p text:style-name="P67"/>
      <text:p text:style-name="P68">            <text:span text:style-name="T56">&lt;/</text:span><text:span text:style-name="T57">div</text:span><text:span text:style-name="T56">&gt;</text:span></text:p>
      <text:p text:style-name="P67"/>
      <text:p text:style-name="P68">    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bloque"</text:span><text:span text:style-name="T56">&gt;</text:span></text:p>
      <text:p text:style-name="P68">                <text:span text:style-name="T56">&lt;</text:span><text:span text:style-name="T57">h3</text:span><text:span text:style-name="T56">&gt;</text:span><text:span text:style-name="T58">4. Gestión de Usuarios y Permisos</text:span><text:span text:style-name="T56">&lt;/</text:span><text:span text:style-name="T57">h3</text:span><text:span text:style-name="T56">&gt;</text:span></text:p>
      <text:p text:style-name="P68">                <text:span text:style-name="T56">&lt;</text:span><text:span text:style-name="T57">p</text:span><text:span text:style-name="T56">&gt;</text:span><text:span text:style-name="T58">Crear usuarios, grupos y asignar permisos en Linux o Windows.</text:span><text:span text:style-name="T56">&lt;/</text:span><text:span text:style-name="T57">p</text:span><text:span text:style-name="T56">&gt;</text:span></text:p>
      <text:p text:style-name="P68">                <text:span text:style-name="T56">&lt;</text:span><text:span text:style-name="T57">img</text:span><text:span text:style-name="T58"> </text:span><text:span text:style-name="T59">src</text:span><text:span text:style-name="T58">=</text:span><text:span text:style-name="T60">"./img/gestionusuarios.png"</text:span><text:span text:style-name="T58"> </text:span><text:span text:style-name="T59">alt</text:span><text:span text:style-name="T58">=</text:span><text:span text:style-name="T60">"gestionusuarios"</text:span><text:span text:style-name="T58"> </text:span><text:span text:style-name="T59">class</text:span><text:span text:style-name="T58">=</text:span><text:span text:style-name="T60">"practicas"</text:span><text:span text:style-name="T56">&gt;</text:span></text:p>
      <text:p text:style-name="P68">            <text:span text:style-name="T56">&lt;/</text:span><text:span text:style-name="T57">div</text:span><text:span text:style-name="T56">&gt;</text:span></text:p>
      <text:p text:style-name="P67"/>
      <text:p text:style-name="P68">    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bloque"</text:span><text:span text:style-name="T56">&gt;</text:span></text:p>
      <text:p text:style-name="P68">                <text:span text:style-name="T56">&lt;</text:span><text:span text:style-name="T57">h3</text:span><text:span text:style-name="T56">&gt;</text:span><text:span text:style-name="T58">5. Configuración de un Servidor DHCP</text:span><text:span text:style-name="T56">&lt;/</text:span><text:span text:style-name="T57">h3</text:span><text:span text:style-name="T56">&gt;</text:span></text:p>
      <text:p text:style-name="P68">                <text:span text:style-name="T56">&lt;</text:span><text:span text:style-name="T57">p</text:span><text:span text:style-name="T56">&gt;</text:span><text:span text:style-name="T58">Asignación automática de direcciones IP en una red.</text:span><text:span text:style-name="T56">&lt;/</text:span><text:span text:style-name="T57">p</text:span><text:span text:style-name="T56">&gt;</text:span></text:p>
      <text:p text:style-name="P68">                <text:span text:style-name="T56">&lt;</text:span><text:span text:style-name="T57">img</text:span><text:span text:style-name="T58"> </text:span><text:span text:style-name="T59">src</text:span><text:span text:style-name="T58">=</text:span><text:span text:style-name="T60">"./img/dhcp.png"</text:span><text:span text:style-name="T58"> </text:span><text:span text:style-name="T59">alt</text:span><text:span text:style-name="T58">=</text:span><text:span text:style-name="T60">"dhcp"</text:span><text:span text:style-name="T58"> </text:span><text:span text:style-name="T59">class</text:span><text:span text:style-name="T58">=</text:span><text:span text:style-name="T60">"practicas"</text:span><text:span text:style-name="T56">&gt;</text:span></text:p>
      <text:p text:style-name="P68">            <text:span text:style-name="T56">&lt;/</text:span><text:span text:style-name="T57">div</text:span><text:span text:style-name="T56">&gt;</text:span></text:p>
      <text:p text:style-name="P67"/>
      <text:p text:style-name="P68">    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bloque"</text:span><text:span text:style-name="T56">&gt;</text:span></text:p>
      <text:p text:style-name="P68">                <text:span text:style-name="T56">&lt;</text:span><text:span text:style-name="T57">h3</text:span><text:span text:style-name="T56">&gt;</text:span><text:span text:style-name="T58">6. Monitorización de Procesos</text:span><text:span text:style-name="T56">&lt;/</text:span><text:span text:style-name="T57">h3</text:span><text:span text:style-name="T56">&gt;</text:span></text:p>
      <text:p text:style-name="P68">                <text:span text:style-name="T56">&lt;</text:span><text:span text:style-name="T57">p</text:span><text:span text:style-name="T56">&gt;</text:span><text:span text:style-name="T58">Uso de herramientas como top, htop o el administrador de tareas.</text:span><text:span text:style-name="T56">&lt;/</text:span><text:span text:style-name="T57">p</text:span><text:span text:style-name="T56">&gt;</text:span></text:p>
      <text:p text:style-name="P68">                <text:span text:style-name="T56">&lt;</text:span><text:span text:style-name="T57">img</text:span><text:span text:style-name="T58"> </text:span><text:span text:style-name="T59">src</text:span><text:span text:style-name="T58">=</text:span><text:span text:style-name="T60">"./img/monitorizacion.jpg"</text:span><text:span text:style-name="T58"> </text:span><text:span text:style-name="T59">alt</text:span><text:span text:style-name="T58">=</text:span><text:span text:style-name="T60">"monitorizacion"</text:span><text:span text:style-name="T58"> </text:span><text:span text:style-name="T59">class</text:span><text:span text:style-name="T58">=</text:span><text:span text:style-name="T60">"practicas"</text:span><text:span text:style-name="T56">&gt;</text:span></text:p>
      <text:p text:style-name="P68">            <text:span text:style-name="T56">&lt;/</text:span><text:span text:style-name="T57">div</text:span><text:span text:style-name="T56">&gt;</text:span></text:p>
      <text:p text:style-name="P68">        <text:span text:style-name="T56">&lt;/</text:span><text:span text:style-name="T57">div</text:span><text:span text:style-name="T56">&gt;</text:span></text:p>
      <text:p text:style-name="P67"/>
      <text:p text:style-name="P68">    <text:span text:style-name="T56">&lt;/</text:span><text:span text:style-name="T57">main</text:span><text:span text:style-name="T56">&gt;</text:span></text:p>
      <text:p text:style-name="P68">    <text:span text:style-name="T56">&lt;</text:span><text:span text:style-name="T57">hr</text:span><text:span text:style-name="T56">&gt;</text:span></text:p>
      <text:p text:style-name="P68">    <text:span text:style-name="T56">&lt;</text:span><text:span text:style-name="T57">footer</text:span><text:span text:style-name="T56">&gt;</text:span></text:p>
      <text:p text:style-name="P68">        <text:span text:style-name="T56">&lt;</text:span><text:span text:style-name="T57">p</text:span><text:span text:style-name="T56">&gt;</text:span><text:span text:style-name="T57">&amp;copy;</text:span><text:span text:style-name="T58"> 2026 Redes y Sistemas Operativos · Proyecto web</text:span><text:span text:style-name="T56">&lt;/</text:span><text:span text:style-name="T57">p</text:span><text:span text:style-name="T56">&gt;</text:span></text:p>
      <text:p text:style-name="P68">    <text:span text:style-name="T56">&lt;/</text:span><text:span text:style-name="T57">footer</text:span><text:span text:style-name="T56">&gt;</text:span></text:p>
      <text:p text:style-name="P67"/>
      <text:p text:style-name="P66"><text:span text:style-name="T52">&lt;/</text:span><text:span text:style-name="T53">body</text:span><text:span text:style-name="T52">&gt;</text:span></text:p>
      <text:p text:style-name="P67"/>
      <text:p text:style-name="P66"><text:span text:style-name="T52">&lt;/</text:span><text:span text:style-name="T53">html</text:span><text:span text:style-name="T52">&gt;</text:span></text:p>
      <text:p text:style-name="P69"><text:tab/></text:p>
      <text:p text:style-name="P70" loext:marker-style-name="T46">(5. Contacto)</text:p>
      <text:p text:style-name="P69"><text:tab/></text:p>
      <text:p text:style-name="P65" loext:marker-style-name="T47"><text:span text:style-name="T48">&lt;!</text:span><text:span text:style-name="T49">DOCTYPE</text:span><text:span text:style-name="T50"> </text:span><text:span text:style-name="T51">html</text:span><text:span text:style-name="T48">&gt;</text:span></text:p>
      <text:p text:style-name="P66"><text:span text:style-name="T52">&lt;</text:span><text:span text:style-name="T53">html</text:span> <text:span text:style-name="T54">lang</text:span>=<text:span text:style-name="T55">"es"</text:span><text:span text:style-name="T52">&gt;</text:span></text:p>
      <text:p text:style-name="P67"/>
      <text:p text:style-name="P66"><text:span text:style-name="T52">&lt;</text:span><text:span text:style-name="T53">head</text:span><text:span text:style-name="T52">&gt;</text:span></text:p>
      <text:p text:style-name="P68">    <text:span text:style-name="T56">&lt;</text:span><text:span text:style-name="T57">meta</text:span><text:span text:style-name="T58"> </text:span><text:span text:style-name="T59">charset</text:span><text:span text:style-name="T58">=</text:span><text:span text:style-name="T60">"UTF-8"</text:span><text:span text:style-name="T56">&gt;</text:span></text:p>
      <text:p text:style-name="P68">    <text:span text:style-name="T56">&lt;</text:span><text:span text:style-name="T57">title</text:span><text:span text:style-name="T56">&gt;</text:span><text:span text:style-name="T58">Formulario de Contacto</text:span><text:span text:style-name="T56">&lt;/</text:span><text:span text:style-name="T57">title</text:span><text:span text:style-name="T56">&gt;</text:span></text:p>
      <text:p text:style-name="P68">    <text:span text:style-name="T56">&lt;</text:span><text:span text:style-name="T57">meta</text:span><text:span text:style-name="T58"> </text:span><text:span text:style-name="T59">name</text:span><text:span text:style-name="T58">=</text:span><text:span text:style-name="T60">"viewport"</text:span><text:span text:style-name="T58"> </text:span><text:span text:style-name="T59">content</text:span><text:span text:style-name="T58">=</text:span><text:span text:style-name="T60">"width=device-width, initial-scale=1.0"</text:span><text:span text:style-name="T56">&gt;</text:span></text:p>
      <text:p text:style-name="P68">    <text:span text:style-name="T56">&lt;</text:span><text:span text:style-name="T57">link</text:span><text:span text:style-name="T58"> </text:span><text:span text:style-name="T59">rel</text:span><text:span text:style-name="T58">=</text:span><text:span text:style-name="T60">"stylesheet"</text:span><text:span text:style-name="T58"> </text:span><text:span text:style-name="T59">href</text:span><text:span text:style-name="T58">=</text:span><text:span text:style-name="T60">"css/styles.css"</text:span><text:span text:style-name="T56">&gt;</text:span></text:p>
      <text:p text:style-name="P66"><text:span text:style-name="T52">&lt;/</text:span><text:span text:style-name="T53">head</text:span><text:span text:style-name="T52">&gt;</text:span></text:p>
      <text:p text:style-name="P67"/>
      <text:p text:style-name="P66"><text:span text:style-name="T52">&lt;</text:span><text:span text:style-name="T53">body</text:span><text:span text:style-name="T52">&gt;</text:span></text:p>
      <text:p text:style-name="P67"/>
      <text:p text:style-name="P68">    <text:span text:style-name="T56">&lt;</text:span><text:span text:style-name="T57">header</text:span><text:span text:style-name="T56">&gt;</text:span></text:p>
      <text:p text:style-name="P68">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titulo"</text:span><text:span text:style-name="T56">&gt;</text:span></text:p>
      <text:p text:style-name="P68">            <text:span text:style-name="T56">&lt;</text:span><text:span text:style-name="T57">h1</text:span><text:span text:style-name="T56">&gt;</text:span><text:span text:style-name="T58">Redes y Sistemas Operativos</text:span><text:span text:style-name="T56">&lt;/</text:span><text:span text:style-name="T57">h1</text:span><text:span text:style-name="T56">&gt;</text:span></text:p>
      <text:p text:style-name="P68">        <text:span text:style-name="T56">&lt;/</text:span><text:span text:style-name="T57">div</text:span><text:span text:style-name="T56">&gt;</text:span></text:p>
      <text:p text:style-name="P68">        <text:span text:style-name="T56">&lt;</text:span><text:span text:style-name="T57">div</text:span><text:span text:style-name="T56">&gt;</text:span></text:p>
      <text:p text:style-name="P68">            <text:span text:style-name="T56">&lt;</text:span><text:span text:style-name="T57">ul</text:span><text:span text:style-name="T58"> </text:span><text:span text:style-name="T59">class</text:span><text:span text:style-name="T58">=</text:span><text:span text:style-name="T60">"menu"</text:span><text:span text:style-name="T56">&gt;</text:span></text:p>
      <text:p text:style-name="P68">                <text:span text:style-name="T56">&lt;</text:span><text:span text:style-name="T57">li</text:span><text:span text:style-name="T56">&gt;&lt;</text:span><text:span text:style-name="T57">a</text:span><text:span text:style-name="T58"> </text:span><text:span text:style-name="T59">href</text:span><text:span text:style-name="T58">=</text:span><text:span text:style-name="T60">"index.html"</text:span><text:span text:style-name="T56">&gt;</text:span><text:span text:style-name="T58">Inicio</text:span><text:span text:style-name="T56">&lt;/</text:span><text:span text:style-name="T57">a</text:span><text:span text:style-name="T56">&gt;&lt;/</text:span><text:span text:style-name="T57">li</text:span><text:span text:style-name="T56">&gt;</text:span></text:p>
      <text:p text:style-name="P68">                <text:span text:style-name="T56">&lt;</text:span><text:span text:style-name="T57">li</text:span><text:span text:style-name="T56">&gt;&lt;</text:span><text:span text:style-name="T57">a</text:span><text:span text:style-name="T58"> </text:span><text:span text:style-name="T59">href</text:span><text:span text:style-name="T58">=</text:span><text:span text:style-name="T60">"redes.html"</text:span><text:span text:style-name="T56">&gt;</text:span><text:span text:style-name="T58">Redes</text:span><text:span text:style-name="T56">&lt;/</text:span><text:span text:style-name="T57">a</text:span><text:span text:style-name="T56">&gt;&lt;/</text:span><text:span text:style-name="T57">li</text:span><text:span text:style-name="T56">&gt;</text:span></text:p>
      <text:p text:style-name="P68">                <text:span text:style-name="T56">&lt;</text:span><text:span text:style-name="T57">li</text:span><text:span text:style-name="T56">&gt;&lt;</text:span><text:span text:style-name="T57">a</text:span><text:span text:style-name="T58"> </text:span><text:span text:style-name="T59">href</text:span><text:span text:style-name="T58">=</text:span><text:span text:style-name="T60">"sistemas.html"</text:span><text:span text:style-name="T56">&gt;</text:span><text:span text:style-name="T58">Sistemas Operativos</text:span><text:span text:style-name="T56">&lt;/</text:span><text:span text:style-name="T57">a</text:span><text:span text:style-name="T56">&gt;&lt;/</text:span><text:span text:style-name="T57">li</text:span><text:span text:style-name="T56">&gt;</text:span></text:p>
      <text:p text:style-name="P68">                <text:span text:style-name="T56">&lt;</text:span><text:span text:style-name="T57">li</text:span><text:span text:style-name="T56">&gt;&lt;</text:span><text:span text:style-name="T57">a</text:span><text:span text:style-name="T58"> </text:span><text:span text:style-name="T59">href</text:span><text:span text:style-name="T58">=</text:span><text:span text:style-name="T60">"practicas.html"</text:span><text:span text:style-name="T56">&gt;</text:span><text:span text:style-name="T58">Prácticas</text:span><text:span text:style-name="T56">&lt;/</text:span><text:span text:style-name="T57">a</text:span><text:span text:style-name="T56">&gt;&lt;/</text:span><text:span text:style-name="T57">li</text:span><text:span text:style-name="T56">&gt;</text:span></text:p>
      <text:p text:style-name="P68">                <text:span text:style-name="T56">&lt;</text:span><text:span text:style-name="T57">li</text:span><text:span text:style-name="T58"> </text:span><text:span text:style-name="T59">class</text:span><text:span text:style-name="T58">=</text:span><text:span text:style-name="T60">"activo"</text:span><text:span text:style-name="T56">&gt;</text:span><text:span text:style-name="T58">Formulario</text:span><text:span text:style-name="T56">&lt;/</text:span><text:span text:style-name="T57">li</text:span><text:span text:style-name="T56">&gt;</text:span></text:p>
      <text:p text:style-name="P68">            <text:span text:style-name="T56">&lt;/</text:span><text:span text:style-name="T57">ul</text:span><text:span text:style-name="T56">&gt;</text:span></text:p>
      <text:p text:style-name="P68">        <text:span text:style-name="T56">&lt;/</text:span><text:span text:style-name="T57">div</text:span><text:span text:style-name="T56">&gt;</text:span></text:p>
      <text:p text:style-name="P68">    <text:span text:style-name="T56">&lt;/</text:span><text:span text:style-name="T57">header</text:span><text:span text:style-name="T56">&gt;</text:span></text:p>
      <text:p text:style-name="P68">    <text:span text:style-name="T56">&lt;</text:span><text:span text:style-name="T57">hr</text:span><text:span text:style-name="T56">&gt;</text:span></text:p>
      <text:p text:style-name="P67"/>
      <text:p text:style-name="P68">    <text:span text:style-name="T56">&lt;</text:span><text:span text:style-name="T57">main</text:span><text:span text:style-name="T56">&gt;</text:span></text:p>
      <text:p text:style-name="P68">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contenedor"</text:span><text:span text:style-name="T56">&gt;</text:span></text:p>
      <text:p text:style-name="P68">            <text:span text:style-name="T56">&lt;</text:span><text:span text:style-name="T57">h2</text:span><text:span text:style-name="T56">&gt;</text:span><text:span text:style-name="T58">Formulario de Contacto</text:span><text:span text:style-name="T56">&lt;/</text:span><text:span text:style-name="T57">h2</text:span><text:span text:style-name="T56">&gt;</text:span></text:p>
      <text:p text:style-name="P68">            <text:span text:style-name="T56">&lt;</text:span><text:span text:style-name="T57">p</text:span><text:span text:style-name="T56">&gt;</text:span><text:span text:style-name="T58">Rellena este formulario para enviarme dudas, sugerencias o comentarios.</text:span><text:span text:style-name="T56">&lt;/</text:span><text:span text:style-name="T57">p</text:span><text:span text:style-name="T56">&gt;</text:span></text:p>
      <text:p text:style-name="P67"/>
      <text:p text:style-name="P68">            <text:span text:style-name="T56">&lt;</text:span><text:span text:style-name="T57">div</text:span><text:span text:style-name="T58"> </text:span><text:span text:style-name="T59">class</text:span><text:span text:style-name="T58">=</text:span><text:span text:style-name="T60">"bloqueform"</text:span><text:span text:style-name="T56">&gt;</text:span></text:p>
      <text:p text:style-name="P68">                <text:span text:style-name="T56">&lt;</text:span><text:span text:style-name="T57">form</text:span><text:span text:style-name="T58"> </text:span><text:span text:style-name="T59">action</text:span><text:span text:style-name="T58">=</text:span><text:span text:style-name="T60">""</text:span><text:span text:style-name="T58"> </text:span><text:span text:style-name="T59">method</text:span><text:span text:style-name="T58">=</text:span><text:span text:style-name="T60">"post"</text:span><text:span text:style-name="T56">&gt;</text:span></text:p>
      <text:p text:style-name="P67"/>
      <text:p text:style-name="P68">                    <text:span text:style-name="T56">&lt;</text:span><text:span text:style-name="T57">label</text:span><text:span text:style-name="T58"> </text:span><text:span text:style-name="T59">for</text:span><text:span text:style-name="T58">=</text:span><text:span text:style-name="T60">"nombre"</text:span><text:span text:style-name="T56">&gt;</text:span><text:span text:style-name="T58">Nombre:</text:span><text:span text:style-name="T56">&lt;/</text:span><text:span text:style-name="T57">label</text:span><text:span text:style-name="T56">&gt;</text:span></text:p>
      <text:p text:style-name="P68">                    <text:span text:style-name="T56">&lt;</text:span><text:span text:style-name="T57">input</text:span><text:span text:style-name="T58"> </text:span><text:span text:style-name="T59">type</text:span><text:span text:style-name="T58">=</text:span><text:span text:style-name="T60">"text"</text:span><text:span text:style-name="T58"> </text:span><text:span text:style-name="T59">id</text:span><text:span text:style-name="T58">=</text:span><text:span text:style-name="T60">"nombre"</text:span><text:span text:style-name="T58"> </text:span><text:span text:style-name="T59">maxlength</text:span><text:span text:style-name="T58">=</text:span><text:span text:style-name="T60">"20"</text:span><text:span text:style-name="T58"> </text:span><text:span text:style-name="T59">name</text:span><text:span text:style-name="T58">=</text:span><text:span text:style-name="T60">"nombre"</text:span><text:span text:style-name="T56">&gt;</text:span></text:p>
      <text:p text:style-name="P67"/>
      <text:p text:style-name="P68">                    <text:span text:style-name="T56">&lt;</text:span><text:span text:style-name="T57">label</text:span><text:span text:style-name="T58"> </text:span><text:span text:style-name="T59">for</text:span><text:span text:style-name="T58">=</text:span><text:span text:style-name="T60">"email"</text:span><text:span text:style-name="T56">&gt;</text:span><text:span text:style-name="T58">Correo electrónico:</text:span><text:span text:style-name="T56">&lt;/</text:span><text:span text:style-name="T57">label</text:span><text:span text:style-name="T56">&gt;</text:span></text:p>
      <text:p text:style-name="P68">                    <text:span text:style-name="T56">&lt;</text:span><text:span text:style-name="T57">input</text:span><text:span text:style-name="T58"> </text:span><text:span text:style-name="T59">type</text:span><text:span text:style-name="T58">=</text:span><text:span text:style-name="T60">"email"</text:span><text:span text:style-name="T58"> </text:span><text:span text:style-name="T59">id</text:span><text:span text:style-name="T58">=</text:span><text:span text:style-name="T60">"email"</text:span><text:span text:style-name="T58"> </text:span><text:span text:style-name="T59">name</text:span><text:span text:style-name="T58">=</text:span><text:span text:style-name="T60">"email"</text:span><text:span text:style-name="T56">&gt;</text:span></text:p>
      <text:p text:style-name="P67"/>
      <text:p text:style-name="P68">                    <text:span text:style-name="T56">&lt;</text:span><text:span text:style-name="T57">label</text:span><text:span text:style-name="T58"> </text:span><text:span text:style-name="T59">for</text:span><text:span text:style-name="T58">=</text:span><text:span text:style-name="T60">"tema"</text:span><text:span text:style-name="T56">&gt;</text:span><text:span text:style-name="T58">Tema:</text:span><text:span text:style-name="T56">&lt;/</text:span><text:span text:style-name="T57">label</text:span><text:span text:style-name="T56">&gt;</text:span></text:p>
      <text:p text:style-name="P68"><text:soft-page-break/>                    <text:span text:style-name="T56">&lt;</text:span><text:span text:style-name="T57">select</text:span><text:span text:style-name="T58"> </text:span><text:span text:style-name="T59">id</text:span><text:span text:style-name="T58">=</text:span><text:span text:style-name="T60">"tema"</text:span><text:span text:style-name="T58"> </text:span><text:span text:style-name="T59">name</text:span><text:span text:style-name="T58">=</text:span><text:span text:style-name="T60">"tema"</text:span><text:span text:style-name="T56">&gt;</text:span></text:p>
      <text:p text:style-name="P68">                        <text:span text:style-name="T56">&lt;</text:span><text:span text:style-name="T57">option</text:span><text:span text:style-name="T58"> </text:span><text:span text:style-name="T59">value</text:span><text:span text:style-name="T58">=</text:span><text:span text:style-name="T60">""</text:span><text:span text:style-name="T56">&gt;</text:span><text:span text:style-name="T58">Selecciona una opción</text:span><text:span text:style-name="T56">&lt;/</text:span><text:span text:style-name="T57">option</text:span><text:span text:style-name="T56">&gt;</text:span></text:p>
      <text:p text:style-name="P68">                        <text:span text:style-name="T56">&lt;</text:span><text:span text:style-name="T57">option</text:span><text:span text:style-name="T58"> </text:span><text:span text:style-name="T59">value</text:span><text:span text:style-name="T58">=</text:span><text:span text:style-name="T60">"redes"</text:span><text:span text:style-name="T56">&gt;</text:span><text:span text:style-name="T58">Redes</text:span><text:span text:style-name="T56">&lt;/</text:span><text:span text:style-name="T57">option</text:span><text:span text:style-name="T56">&gt;</text:span></text:p>
      <text:p text:style-name="P68">                        <text:span text:style-name="T56">&lt;</text:span><text:span text:style-name="T57">option</text:span><text:span text:style-name="T58"> </text:span><text:span text:style-name="T59">value</text:span><text:span text:style-name="T58">=</text:span><text:span text:style-name="T60">"sistemas"</text:span><text:span text:style-name="T56">&gt;</text:span><text:span text:style-name="T58">Sistemas Operativos</text:span><text:span text:style-name="T56">&lt;/</text:span><text:span text:style-name="T57">option</text:span><text:span text:style-name="T56">&gt;</text:span></text:p>
      <text:p text:style-name="P68">                        <text:span text:style-name="T56">&lt;</text:span><text:span text:style-name="T57">option</text:span><text:span text:style-name="T58"> </text:span><text:span text:style-name="T59">value</text:span><text:span text:style-name="T58">=</text:span><text:span text:style-name="T60">"practicas"</text:span><text:span text:style-name="T56">&gt;</text:span><text:span text:style-name="T58">Prácticas</text:span><text:span text:style-name="T56">&lt;/</text:span><text:span text:style-name="T57">option</text:span><text:span text:style-name="T56">&gt;</text:span></text:p>
      <text:p text:style-name="P68">                        <text:span text:style-name="T56">&lt;</text:span><text:span text:style-name="T57">option</text:span><text:span text:style-name="T58"> </text:span><text:span text:style-name="T59">value</text:span><text:span text:style-name="T58">=</text:span><text:span text:style-name="T60">"otros"</text:span><text:span text:style-name="T56">&gt;</text:span><text:span text:style-name="T58">Luisma me voy a FP de jardinería a este paso</text:span><text:span text:style-name="T56">&lt;/</text:span><text:span text:style-name="T57">option</text:span><text:span text:style-name="T56">&gt;</text:span></text:p>
      <text:p text:style-name="P68">                    <text:span text:style-name="T56">&lt;/</text:span><text:span text:style-name="T57">select</text:span><text:span text:style-name="T56">&gt;</text:span></text:p>
      <text:p text:style-name="P67"/>
      <text:p text:style-name="P68">                    <text:span text:style-name="T56">&lt;</text:span><text:span text:style-name="T57">label</text:span><text:span text:style-name="T58"> </text:span><text:span text:style-name="T59">for</text:span><text:span text:style-name="T58">=</text:span><text:span text:style-name="T60">"mensaje"</text:span><text:span text:style-name="T56">&gt;</text:span><text:span text:style-name="T58">Mensaje:</text:span><text:span text:style-name="T56">&lt;/</text:span><text:span text:style-name="T57">label</text:span><text:span text:style-name="T56">&gt;</text:span></text:p>
      <text:p text:style-name="P68">                    <text:span text:style-name="T56">&lt;</text:span><text:span text:style-name="T57">textarea</text:span><text:span text:style-name="T58"> </text:span><text:span text:style-name="T59">id</text:span><text:span text:style-name="T58">=</text:span><text:span text:style-name="T60">"mensaje"</text:span><text:span text:style-name="T58"> </text:span><text:span text:style-name="T59">name</text:span><text:span text:style-name="T58">=</text:span><text:span text:style-name="T60">"mensaje"</text:span><text:span text:style-name="T58"> </text:span><text:span text:style-name="T59">rows</text:span><text:span text:style-name="T58">=</text:span><text:span text:style-name="T60">"5"</text:span><text:span text:style-name="T56">&gt;&lt;/</text:span><text:span text:style-name="T57">textarea</text:span><text:span text:style-name="T56">&gt;</text:span></text:p>
      <text:p text:style-name="P67"/>
      <text:p text:style-name="P68">                    <text:span text:style-name="T56">&lt;</text:span><text:span text:style-name="T57">button</text:span><text:span text:style-name="T58"> </text:span><text:span text:style-name="T59">type</text:span><text:span text:style-name="T58">=</text:span><text:span text:style-name="T60">"submit"</text:span><text:span text:style-name="T58"> </text:span><text:span text:style-name="T59">class</text:span><text:span text:style-name="T58">=</text:span><text:span text:style-name="T60">"boton"</text:span><text:span text:style-name="T56">&gt;</text:span><text:span text:style-name="T58">Enviar</text:span><text:span text:style-name="T56">&lt;/</text:span><text:span text:style-name="T57">button</text:span><text:span text:style-name="T56">&gt;</text:span></text:p>
      <text:p text:style-name="P68">                <text:span text:style-name="T56">&lt;/</text:span><text:span text:style-name="T57">form</text:span><text:span text:style-name="T56">&gt;</text:span></text:p>
      <text:p text:style-name="P68">            <text:span text:style-name="T56">&lt;/</text:span><text:span text:style-name="T57">div</text:span><text:span text:style-name="T56">&gt;</text:span></text:p>
      <text:p text:style-name="P68">        <text:span text:style-name="T56">&lt;/</text:span><text:span text:style-name="T57">div</text:span><text:span text:style-name="T56">&gt;</text:span></text:p>
      <text:p text:style-name="P68">    <text:span text:style-name="T56">&lt;/</text:span><text:span text:style-name="T57">main</text:span><text:span text:style-name="T56">&gt;</text:span></text:p>
      <text:p text:style-name="P67"/>
      <text:p text:style-name="P68">    <text:span text:style-name="T56">&lt;</text:span><text:span text:style-name="T57">hr</text:span><text:span text:style-name="T56">&gt;</text:span></text:p>
      <text:p text:style-name="P68">    <text:span text:style-name="T56">&lt;</text:span><text:span text:style-name="T57">footer</text:span><text:span text:style-name="T56">&gt;</text:span></text:p>
      <text:p text:style-name="P68">        <text:span text:style-name="T56">&lt;</text:span><text:span text:style-name="T57">p</text:span><text:span text:style-name="T56">&gt;</text:span><text:span text:style-name="T57">&amp;copy;</text:span><text:span text:style-name="T58"> 2026 Redes y Sistemas Operativos · Proyecto web</text:span><text:span text:style-name="T56">&lt;/</text:span><text:span text:style-name="T57">p</text:span><text:span text:style-name="T56">&gt;</text:span></text:p>
      <text:p text:style-name="P68">    <text:span text:style-name="T56">&lt;/</text:span><text:span text:style-name="T57">footer</text:span><text:span text:style-name="T56">&gt;</text:span></text:p>
      <text:p text:style-name="P67"/>
      <text:p text:style-name="P66"><text:span text:style-name="T52">&lt;/</text:span><text:span text:style-name="T53">body</text:span><text:span text:style-name="T52">&gt;</text:span></text:p>
      <text:p text:style-name="P67"/>
      <text:p text:style-name="P66"><text:span text:style-name="T52">&lt;/</text:span><text:span text:style-name="T53">html</text:span><text:span text:style-name="T52">&gt;</text:span></text:p>
      <text:p text:style-name="P72" loext:marker-style-name="T47"><text:span text:style-name="T47"/></text:p>
      <text:p text:style-name="P64"><text:tab/></text:p>
      <text:p text:style-name="P73" loext:marker-style-name="T47"/>
      <text:h text:style-name="P74" text:outline-level="1" loext:marker-style-name="T46"><text:bookmark-start text:name="_Toc224731931"/><text:bookmark-start text:name="__RefHeading___Toc7744_668617124"/><text:span text:style-name="T46">Anexo II: Código CSS utilizado</text:span><text:bookmark-end text:name="_Toc224731931"/><text:bookmark-end text:name="__RefHeading___Toc7744_668617124"/><text:span text:style-name="T46"/></text:h>
      <text:p text:style-name="P64"><text:tab/></text:p>
      <text:p text:style-name="P72" loext:marker-style-name="T47"/>
      <text:p text:style-name="P65" loext:marker-style-name="T47"><text:span text:style-name="T49">*</text:span><text:span text:style-name="T50"> {</text:span></text:p>
      <text:p text:style-name="P68">    <text:span text:style-name="T59">margin</text:span><text:span text:style-name="T58">: </text:span><text:span text:style-name="T61">0</text:span><text:span text:style-name="T58">;</text:span></text:p>
      <text:p text:style-name="P68">    <text:span text:style-name="T59">padding</text:span><text:span text:style-name="T58">: </text:span><text:span text:style-name="T61">0</text:span><text:span text:style-name="T58">;</text:span></text:p>
      <text:p text:style-name="P68">    <text:span text:style-name="T59">box-sizing</text:span><text:span text:style-name="T58">: </text:span><text:span text:style-name="T60">border-box</text:span><text:span text:style-name="T58">;</text:span></text:p>
      <text:p text:style-name="P68">    <text:span text:style-name="T59">font-family</text:span><text:span text:style-name="T58">: </text:span><text:span text:style-name="T60">"Segoe UI"</text:span><text:span text:style-name="T58">, </text:span><text:span text:style-name="T60">Arial</text:span><text:span text:style-name="T58">, </text:span><text:span text:style-name="T60">sans-serif</text:span><text:span text:style-name="T58">;</text:span></text:p>
      <text:p text:style-name="P66">}</text:p>
      <text:p text:style-name="P67"/>
      <text:p text:style-name="P66"><text:span text:style-name="T62">body</text:span> {</text:p>
      <text:p text:style-name="P68">    <text:span text:style-name="T59">background</text:span><text:span text:style-name="T58">: </text:span><text:span text:style-name="T60">#f1f4f7</text:span><text:span text:style-name="T58">;</text:span></text:p>
      <text:p text:style-name="P68">    <text:span text:style-name="T59">color</text:span><text:span text:style-name="T58">: </text:span><text:span text:style-name="T60">#222</text:span><text:span text:style-name="T58">;</text:span></text:p>
      <text:p text:style-name="P68">    <text:span text:style-name="T59">line-height</text:span><text:span text:style-name="T58">: </text:span><text:span text:style-name="T61">1.6</text:span><text:span text:style-name="T58">;</text:span></text:p>
      <text:p text:style-name="P66">}</text:p>
      <text:p text:style-name="P67"/>
      <text:p text:style-name="P66"><text:span text:style-name="T62">a</text:span> {</text:p>
      <text:p text:style-name="P68">    <text:span text:style-name="T59">color</text:span><text:span text:style-name="T58">: </text:span><text:span text:style-name="T63">rgb</text:span><text:span text:style-name="T58">(</text:span><text:span text:style-name="T61">211</text:span><text:span text:style-name="T58">, </text:span><text:span text:style-name="T61">211</text:span><text:span text:style-name="T58">, </text:span><text:span text:style-name="T61">211</text:span><text:span text:style-name="T58">);</text:span></text:p>
      <text:p text:style-name="P68">    <text:span text:style-name="T59">text-decoration</text:span><text:span text:style-name="T58">: </text:span><text:span text:style-name="T60">none</text:span><text:span text:style-name="T58">;</text:span></text:p>
      <text:p text:style-name="P66">}</text:p>
      <text:p text:style-name="P67"/>
      <text:p text:style-name="P66"><text:span text:style-name="T62">a:hover</text:span> {</text:p>
      <text:p text:style-name="P68">    <text:span text:style-name="T59">background-color</text:span><text:span text:style-name="T58">: </text:span><text:span text:style-name="T60">transparent</text:span><text:span text:style-name="T58">;</text:span></text:p>
      <text:p text:style-name="P68">    <text:span text:style-name="T59">text-decoration</text:span><text:span text:style-name="T58">: </text:span><text:span text:style-name="T60">none</text:span><text:span text:style-name="T58">;</text:span></text:p>
      <text:p text:style-name="P66">}</text:p>
      <text:p text:style-name="P75"/>
      <text:p text:style-name="P66"><text:span text:style-name="T62">header</text:span> {</text:p>
      <text:p text:style-name="P68">    <text:span text:style-name="T59">background</text:span><text:span text:style-name="T58">: </text:span><text:span text:style-name="T60">#5e5464</text:span><text:span text:style-name="T58">;</text:span></text:p>
      <text:p text:style-name="P68">    <text:span text:style-name="T59">color</text:span><text:span text:style-name="T58">: </text:span><text:span text:style-name="T60">white</text:span><text:span text:style-name="T58">;</text:span></text:p>
      <text:p text:style-name="P68">    <text:span text:style-name="T59">padding</text:span><text:span text:style-name="T58">: </text:span><text:span text:style-name="T61">20px</text:span><text:span text:style-name="T58">;</text:span></text:p>
      <text:p text:style-name="P68">    <text:span text:style-name="T59">text-align</text:span><text:span text:style-name="T58">: </text:span><text:span text:style-name="T60">center</text:span><text:span text:style-name="T58">;</text:span></text:p>
      <text:p text:style-name="P68">    <text:span text:style-name="T59">border-bottom</text:span><text:span text:style-name="T58">: </text:span><text:span text:style-name="T61">4px</text:span><text:span text:style-name="T58"> </text:span><text:span text:style-name="T60">solid</text:span><text:span text:style-name="T58"> </text:span><text:span text:style-name="T60">#62397a</text:span><text:span text:style-name="T58">;</text:span></text:p>
      <text:p text:style-name="P66">}</text:p>
      <text:p text:style-name="P67"/>
      <text:p text:style-name="P66"><text:span text:style-name="T62">.menu</text:span> <text:span text:style-name="T62">ul</text:span> {</text:p>
      <text:p text:style-name="P68">    <text:span text:style-name="T59">list-style</text:span><text:span text:style-name="T58">: </text:span><text:span text:style-name="T60">none</text:span><text:span text:style-name="T58">;</text:span></text:p>
      <text:p text:style-name="P68">    <text:span text:style-name="T59">display</text:span><text:span text:style-name="T58">: </text:span><text:span text:style-name="T60">flex</text:span><text:span text:style-name="T58">;</text:span></text:p>
      <text:p text:style-name="P68">    <text:span text:style-name="T59">justify-content</text:span><text:span text:style-name="T58">: </text:span><text:span text:style-name="T60">center</text:span><text:span text:style-name="T58">;</text:span></text:p>
      <text:p text:style-name="P68">    <text:span text:style-name="T59">gap</text:span><text:span text:style-name="T58">: </text:span><text:span text:style-name="T61">25px</text:span><text:span text:style-name="T58">;</text:span></text:p>
      <text:p text:style-name="P68">    <text:span text:style-name="T59">margin-top</text:span><text:span text:style-name="T58">: </text:span><text:span text:style-name="T61">15px</text:span><text:span text:style-name="T58">;</text:span></text:p>
      <text:p text:style-name="P66">}</text:p>
      <text:p text:style-name="P67"/>
      <text:p text:style-name="P66"><text:span text:style-name="T62">div</text:span> <text:span text:style-name="T62">ul</text:span> {</text:p>
      <text:p text:style-name="P68"><text:soft-page-break/>    <text:span text:style-name="T59">list-style</text:span><text:span text:style-name="T58">: </text:span><text:span text:style-name="T60">none</text:span><text:span text:style-name="T58">;</text:span></text:p>
      <text:p text:style-name="P68">    <text:span text:style-name="T59">display</text:span><text:span text:style-name="T58">: </text:span><text:span text:style-name="T60">flex</text:span><text:span text:style-name="T58">;</text:span></text:p>
      <text:p text:style-name="P68">    <text:span text:style-name="T59">justify-content</text:span><text:span text:style-name="T58">: </text:span><text:span text:style-name="T60">center</text:span><text:span text:style-name="T58">;</text:span></text:p>
      <text:p text:style-name="P68">    <text:span text:style-name="T59">gap</text:span><text:span text:style-name="T58">: </text:span><text:span text:style-name="T61">25px</text:span><text:span text:style-name="T58">;</text:span></text:p>
      <text:p text:style-name="P68">    <text:span text:style-name="T59">margin-top</text:span><text:span text:style-name="T58">: </text:span><text:span text:style-name="T61">15px</text:span><text:span text:style-name="T58">;</text:span></text:p>
      <text:p text:style-name="P66">}</text:p>
      <text:p text:style-name="P67"/>
      <text:p text:style-name="P66"><text:span text:style-name="T62">div.heroimagen</text:span> {</text:p>
      <text:p text:style-name="P67"/>
      <text:p text:style-name="P68">    <text:span text:style-name="T59">width</text:span><text:span text:style-name="T58">: </text:span><text:span text:style-name="T61">100%</text:span><text:span text:style-name="T58">;</text:span></text:p>
      <text:p text:style-name="P68">    <text:span text:style-name="T59">display</text:span><text:span text:style-name="T58">: </text:span><text:span text:style-name="T60">block</text:span><text:span text:style-name="T58">;</text:span></text:p>
      <text:p text:style-name="P66">}</text:p>
      <text:p text:style-name="P67"/>
      <text:p text:style-name="P66"><text:span text:style-name="T62">.heroimagen</text:span><text:span text:style-name="T64">&gt;</text:span><text:span text:style-name="T62">img</text:span> {</text:p>
      <text:p text:style-name="P68">    <text:span text:style-name="T59">width</text:span><text:span text:style-name="T58">: </text:span><text:span text:style-name="T61">100%</text:span><text:span text:style-name="T58">;</text:span></text:p>
      <text:p text:style-name="P68">    <text:span text:style-name="T59">height</text:span><text:span text:style-name="T58">: </text:span><text:span text:style-name="T61">30em</text:span><text:span text:style-name="T58">;</text:span></text:p>
      <text:p text:style-name="P68">    <text:span text:style-name="T59">border-radius</text:span><text:span text:style-name="T58">: </text:span><text:span text:style-name="T61">15px</text:span><text:span text:style-name="T58">;</text:span></text:p>
      <text:p text:style-name="P68">    <text:span text:style-name="T59">justify-content</text:span><text:span text:style-name="T58">: </text:span><text:span text:style-name="T60">center</text:span><text:span text:style-name="T58">;</text:span></text:p>
      <text:p text:style-name="P68">    <text:span text:style-name="T59">align-self</text:span><text:span text:style-name="T58">: </text:span><text:span text:style-name="T60">center</text:span><text:span text:style-name="T58">;</text:span></text:p>
      <text:p text:style-name="P68">    <text:span text:style-name="T59">margin-top</text:span><text:span text:style-name="T58">: </text:span><text:span text:style-name="T61">1.8em</text:span><text:span text:style-name="T58">;</text:span></text:p>
      <text:p text:style-name="P68">    <text:span text:style-name="T59">margin-bottom</text:span><text:span text:style-name="T58">: </text:span><text:span text:style-name="T61">1.8em</text:span><text:span text:style-name="T58">;</text:span></text:p>
      <text:p text:style-name="P66">}</text:p>
      <text:p text:style-name="P67"/>
      <text:p text:style-name="P66"><text:span text:style-name="T62">.herotexto</text:span><text:span text:style-name="T64">&gt;</text:span><text:span text:style-name="T62">p</text:span> {</text:p>
      <text:p text:style-name="P68">    <text:span text:style-name="T59">margin-left</text:span><text:span text:style-name="T58">: </text:span><text:span text:style-name="T61">2em</text:span><text:span text:style-name="T58">;</text:span></text:p>
      <text:p text:style-name="P66">}</text:p>
      <text:p text:style-name="P67"/>
      <text:p text:style-name="P66"><text:span text:style-name="T62">ul</text:span> {</text:p>
      <text:p text:style-name="P68">    <text:span text:style-name="T59">list-style</text:span><text:span text:style-name="T58">: </text:span><text:span text:style-name="T60">none</text:span><text:span text:style-name="T58">;</text:span></text:p>
      <text:p text:style-name="P66">}</text:p>
      <text:p text:style-name="P67"/>
      <text:p text:style-name="P66"><text:span text:style-name="T62">div</text:span> <text:span text:style-name="T62">ul</text:span> <text:span text:style-name="T62">li</text:span> <text:span text:style-name="T62">a:hover</text:span> {</text:p>
      <text:p text:style-name="P68">    <text:span text:style-name="T59">color</text:span><text:span text:style-name="T58">: </text:span><text:span text:style-name="T60">white</text:span><text:span text:style-name="T58">;</text:span></text:p>
      <text:p text:style-name="P66">}</text:p>
      <text:p text:style-name="P67"/>
      <text:p text:style-name="P66"><text:span text:style-name="T62">.activo</text:span> {</text:p>
      <text:p text:style-name="P68">    <text:span text:style-name="T59">background</text:span><text:span text:style-name="T58">: </text:span><text:span text:style-name="T60">#4e3e55</text:span><text:span text:style-name="T58">;</text:span></text:p>
      <text:p text:style-name="P68">    <text:span text:style-name="T59">padding</text:span><text:span text:style-name="T58">: </text:span><text:span text:style-name="T61">8px</text:span><text:span text:style-name="T58"> </text:span><text:span text:style-name="T61">12px</text:span><text:span text:style-name="T58">;</text:span></text:p>
      <text:p text:style-name="P68">    <text:span text:style-name="T59">border-radius</text:span><text:span text:style-name="T58">: </text:span><text:span text:style-name="T61">5px</text:span><text:span text:style-name="T58">;</text:span></text:p>
      <text:p text:style-name="P68">    <text:span text:style-name="T59">font-weight</text:span><text:span text:style-name="T58">: </text:span><text:span text:style-name="T60">bold</text:span><text:span text:style-name="T58">;</text:span></text:p>
      <text:p text:style-name="P66">}</text:p>
      <text:p text:style-name="P67"/>
      <text:p text:style-name="P66"><text:span text:style-name="T62">.contenedor</text:span> {</text:p>
      <text:p text:style-name="P68">    <text:span text:style-name="T59">width</text:span><text:span text:style-name="T58">: </text:span><text:span text:style-name="T61">90%</text:span><text:span text:style-name="T58">;</text:span></text:p>
      <text:p text:style-name="P68">    <text:span text:style-name="T59">max-width</text:span><text:span text:style-name="T58">: </text:span><text:span text:style-name="T61">900px</text:span><text:span text:style-name="T58">;</text:span></text:p>
      <text:p text:style-name="P68">    <text:span text:style-name="T59">margin</text:span><text:span text:style-name="T58">: </text:span><text:span text:style-name="T61">40px</text:span><text:span text:style-name="T58"> </text:span><text:span text:style-name="T60">auto</text:span><text:span text:style-name="T58">;</text:span></text:p>
      <text:p text:style-name="P66">}</text:p>
      <text:p text:style-name="P67"/>
      <text:p text:style-name="P66"><text:span text:style-name="T62">h2</text:span> {</text:p>
      <text:p text:style-name="P68"><text:soft-page-break/>    <text:span text:style-name="T59">font-size</text:span><text:span text:style-name="T58">: </text:span><text:span text:style-name="T61">2em</text:span><text:span text:style-name="T58">;</text:span></text:p>
      <text:p text:style-name="P68">    <text:span text:style-name="T59">margin-bottom</text:span><text:span text:style-name="T58">: </text:span><text:span text:style-name="T61">1.25px</text:span><text:span text:style-name="T58">;</text:span></text:p>
      <text:p text:style-name="P68">    <text:span text:style-name="T59">color</text:span><text:span text:style-name="T58">: </text:span><text:span text:style-name="T60">#3f0a62</text:span><text:span text:style-name="T58">;</text:span></text:p>
      <text:p text:style-name="P68">    <text:span text:style-name="T59">margin-top</text:span><text:span text:style-name="T58">: </text:span><text:span text:style-name="T61">1em</text:span><text:span text:style-name="T58">;</text:span></text:p>
      <text:p text:style-name="P68">    <text:span text:style-name="T59">margin-left</text:span><text:span text:style-name="T58">: </text:span><text:span text:style-name="T61">1em</text:span><text:span text:style-name="T58">;</text:span></text:p>
      <text:p text:style-name="P66">}</text:p>
      <text:p text:style-name="P67"/>
      <text:p text:style-name="P66"><text:span text:style-name="T62">.bloque</text:span> {</text:p>
      <text:p text:style-name="P68">    <text:span text:style-name="T59">background</text:span><text:span text:style-name="T58">: </text:span><text:span text:style-name="T60">white</text:span><text:span text:style-name="T58">;</text:span></text:p>
      <text:p text:style-name="P68">    <text:span text:style-name="T59">padding</text:span><text:span text:style-name="T58">: </text:span><text:span text:style-name="T61">20px</text:span><text:span text:style-name="T58">;</text:span></text:p>
      <text:p text:style-name="P68">    <text:span text:style-name="T59">margin-bottom</text:span><text:span text:style-name="T58">: </text:span><text:span text:style-name="T61">1.5em</text:span><text:span text:style-name="T58">;</text:span></text:p>
      <text:p text:style-name="P68">    <text:span text:style-name="T59">border-radius</text:span><text:span text:style-name="T58">: </text:span><text:span text:style-name="T61">10px</text:span><text:span text:style-name="T58">;</text:span></text:p>
      <text:p text:style-name="P68">    <text:span text:style-name="T59">box-shadow</text:span><text:span text:style-name="T58">: </text:span><text:span text:style-name="T61">0</text:span><text:span text:style-name="T58"> </text:span><text:span text:style-name="T61">4px</text:span><text:span text:style-name="T58"> </text:span><text:span text:style-name="T61">10px</text:span><text:span text:style-name="T58"> </text:span><text:span text:style-name="T63">rgba</text:span><text:span text:style-name="T58">(</text:span><text:span text:style-name="T61">0</text:span><text:span text:style-name="T58">, </text:span><text:span text:style-name="T61">0</text:span><text:span text:style-name="T58">, </text:span><text:span text:style-name="T61">0</text:span><text:span text:style-name="T58">, </text:span><text:span text:style-name="T61">0.08</text:span><text:span text:style-name="T58">);</text:span></text:p>
      <text:p text:style-name="P68">    <text:span text:style-name="T59">display</text:span><text:span text:style-name="T58">: </text:span><text:span text:style-name="T60">block</text:span><text:span text:style-name="T58">;</text:span></text:p>
      <text:p text:style-name="P66">}</text:p>
      <text:p text:style-name="P67"/>
      <text:p text:style-name="P66"><text:span text:style-name="T62">.bloque</text:span> <text:span text:style-name="T62">img</text:span> {</text:p>
      <text:p text:style-name="P68">    <text:span text:style-name="T59">width</text:span><text:span text:style-name="T58">: </text:span><text:span text:style-name="T61">100%</text:span><text:span text:style-name="T58">;</text:span></text:p>
      <text:p text:style-name="P68">    <text:span text:style-name="T59">max-width</text:span><text:span text:style-name="T58">: </text:span><text:span text:style-name="T61">600px</text:span><text:span text:style-name="T58">;</text:span></text:p>
      <text:p text:style-name="P68">    <text:span text:style-name="T59">border-radius</text:span><text:span text:style-name="T58">: </text:span><text:span text:style-name="T61">10px</text:span><text:span text:style-name="T58">;</text:span></text:p>
      <text:p text:style-name="P68">    <text:span text:style-name="T59">margin-top</text:span><text:span text:style-name="T58">: </text:span><text:span text:style-name="T61">10px</text:span><text:span text:style-name="T58">;</text:span></text:p>
      <text:p text:style-name="P68">    <text:span text:style-name="T59">margin-bottom</text:span><text:span text:style-name="T58">: </text:span><text:span text:style-name="T61">10px</text:span><text:span text:style-name="T58">;</text:span></text:p>
      <text:p text:style-name="P66">}</text:p>
      <text:p text:style-name="P67"/>
      <text:p text:style-name="P66"><text:span text:style-name="T62">.bloque</text:span> <text:span text:style-name="T62">img.sistemasbombo</text:span> {</text:p>
      <text:p text:style-name="P68">    <text:span text:style-name="T59">margin</text:span><text:span text:style-name="T58">: </text:span><text:span text:style-name="T60">auto</text:span><text:span text:style-name="T58">;</text:span></text:p>
      <text:p text:style-name="P68">    <text:span text:style-name="T59">display</text:span><text:span text:style-name="T58">: </text:span><text:span text:style-name="T60">block</text:span><text:span text:style-name="T58">;</text:span></text:p>
      <text:p text:style-name="P66">}</text:p>
      <text:p text:style-name="P67"/>
      <text:p text:style-name="P66"><text:span text:style-name="T62">.bloque</text:span> <text:span text:style-name="T62">img.practicas</text:span> {</text:p>
      <text:p text:style-name="P68">    <text:span text:style-name="T59">margin</text:span><text:span text:style-name="T58">: </text:span><text:span text:style-name="T60">auto</text:span><text:span text:style-name="T58">;</text:span></text:p>
      <text:p text:style-name="P68">    <text:span text:style-name="T59">display</text:span><text:span text:style-name="T58">: </text:span><text:span text:style-name="T60">block</text:span><text:span text:style-name="T58">;</text:span></text:p>
      <text:p text:style-name="P66">}</text:p>
      <text:p text:style-name="P67"/>
      <text:p text:style-name="P66"><text:span text:style-name="T62">.bloque</text:span> <text:span text:style-name="T62">img.redesytodalapesca</text:span> {</text:p>
      <text:p text:style-name="P68">    <text:span text:style-name="T59">margin</text:span><text:span text:style-name="T58">: </text:span><text:span text:style-name="T60">auto</text:span><text:span text:style-name="T58">;</text:span></text:p>
      <text:p text:style-name="P68">    <text:span text:style-name="T59">display</text:span><text:span text:style-name="T58">: </text:span><text:span text:style-name="T60">block</text:span><text:span text:style-name="T58">;</text:span></text:p>
      <text:p text:style-name="P66">}</text:p>
      <text:p text:style-name="P75"/>
      <text:p text:style-name="P66"><text:span text:style-name="T62">.bloque:hover</text:span> {</text:p>
      <text:p text:style-name="P68">    <text:span text:style-name="T59">box-shadow</text:span><text:span text:style-name="T58">: </text:span><text:span text:style-name="T61">0</text:span><text:span text:style-name="T58"> </text:span><text:span text:style-name="T61">10px</text:span><text:span text:style-name="T58"> </text:span><text:span text:style-name="T61">14px</text:span><text:span text:style-name="T58"> </text:span><text:span text:style-name="T63">rgba</text:span><text:span text:style-name="T58">(</text:span><text:span text:style-name="T61">59</text:span><text:span text:style-name="T58">, </text:span><text:span text:style-name="T61">40</text:span><text:span text:style-name="T58">, </text:span><text:span text:style-name="T61">71</text:span><text:span text:style-name="T58">, </text:span><text:span text:style-name="T61">0.7</text:span><text:span text:style-name="T58">);</text:span></text:p>
      <text:p text:style-name="P68">    <text:span text:style-name="T59">border-left</text:span><text:span text:style-name="T58">: </text:span><text:span text:style-name="T61">3px</text:span><text:span text:style-name="T58"> </text:span><text:span text:style-name="T60">solid</text:span><text:span text:style-name="T58"> </text:span><text:span text:style-name="T60">#935fbd</text:span><text:span text:style-name="T58">;</text:span></text:p>
      <text:p text:style-name="P68">    <text:span text:style-name="T59">transition</text:span><text:span text:style-name="T58">: </text:span><text:span text:style-name="T61">0.3s</text:span><text:span text:style-name="T58">;</text:span></text:p>
      <text:p text:style-name="P66">}</text:p>
      <text:p text:style-name="P67"/>
      <text:p text:style-name="P66"><text:span text:style-name="T62">.bloque</text:span> <text:span text:style-name="T62">h3</text:span> {</text:p>
      <text:p text:style-name="P68">    <text:span text:style-name="T59">margin-bottom</text:span><text:span text:style-name="T58">: </text:span><text:span text:style-name="T61">10px</text:span><text:span text:style-name="T58">;</text:span></text:p>
      <text:p text:style-name="P68">    <text:span text:style-name="T59">color</text:span><text:span text:style-name="T58">: </text:span><text:span text:style-name="T60">#823c7f</text:span><text:span text:style-name="T58">;</text:span></text:p>
      <text:p text:style-name="P66"><text:soft-page-break/>}</text:p>
      <text:p text:style-name="P67"/>
      <text:p text:style-name="P66"><text:span text:style-name="T62">.boton</text:span> {</text:p>
      <text:p text:style-name="P68">    <text:span text:style-name="T59">border</text:span><text:span text:style-name="T58">: </text:span><text:span text:style-name="T61">2px</text:span><text:span text:style-name="T58"> </text:span><text:span text:style-name="T60">solid</text:span><text:span text:style-name="T58"> </text:span><text:span text:style-name="T63">rgb</text:span><text:span text:style-name="T58">(</text:span><text:span text:style-name="T61">182</text:span><text:span text:style-name="T58">, </text:span><text:span text:style-name="T61">148</text:span><text:span text:style-name="T58">, </text:span><text:span text:style-name="T61">230</text:span><text:span text:style-name="T58">);</text:span></text:p>
      <text:p text:style-name="P68">    <text:span text:style-name="T59">box-shadow</text:span><text:span text:style-name="T58">: </text:span><text:span text:style-name="T61">0</text:span><text:span text:style-name="T58"> </text:span><text:span text:style-name="T61">6px</text:span><text:span text:style-name="T58"> </text:span><text:span text:style-name="T61">8px</text:span><text:span text:style-name="T58"> </text:span><text:span text:style-name="T63">rgba</text:span><text:span text:style-name="T58">(</text:span><text:span text:style-name="T61">59</text:span><text:span text:style-name="T58">, </text:span><text:span text:style-name="T61">40</text:span><text:span text:style-name="T58">, </text:span><text:span text:style-name="T61">71</text:span><text:span text:style-name="T58">, </text:span><text:span text:style-name="T61">0.5</text:span><text:span text:style-name="T58">);</text:span></text:p>
      <text:p text:style-name="P68">    <text:span text:style-name="T59">display</text:span><text:span text:style-name="T58">: </text:span><text:span text:style-name="T60">inline-block</text:span><text:span text:style-name="T58">;</text:span></text:p>
      <text:p text:style-name="P68">    <text:span text:style-name="T59">background</text:span><text:span text:style-name="T58">: </text:span><text:span text:style-name="T60">#3a0a62</text:span><text:span text:style-name="T58">;</text:span></text:p>
      <text:p text:style-name="P68">    <text:span text:style-name="T59">color</text:span><text:span text:style-name="T58">: </text:span><text:span text:style-name="T60">white</text:span><text:span text:style-name="T58">;</text:span></text:p>
      <text:p text:style-name="P68">    <text:span text:style-name="T59">padding</text:span><text:span text:style-name="T58">: </text:span><text:span text:style-name="T61">10px</text:span><text:span text:style-name="T58"> </text:span><text:span text:style-name="T61">15px</text:span><text:span text:style-name="T58">;</text:span></text:p>
      <text:p text:style-name="P68">    <text:span text:style-name="T59">text-decoration</text:span><text:span text:style-name="T58">: </text:span><text:span text:style-name="T60">none</text:span><text:span text:style-name="T58">;</text:span></text:p>
      <text:p text:style-name="P68">    <text:span text:style-name="T59">border-radius</text:span><text:span text:style-name="T58">: </text:span><text:span text:style-name="T61">6px</text:span><text:span text:style-name="T58">;</text:span></text:p>
      <text:p text:style-name="P68">    <text:span text:style-name="T59">margin-top</text:span><text:span text:style-name="T58">: </text:span><text:span text:style-name="T61">1em</text:span><text:span text:style-name="T58">;</text:span></text:p>
      <text:p text:style-name="P68">    <text:span text:style-name="T59">margin-bottom</text:span><text:span text:style-name="T58">: </text:span><text:span text:style-name="T61">1em</text:span><text:span text:style-name="T58">;</text:span></text:p>
      <text:p text:style-name="P66">}</text:p>
      <text:p text:style-name="P67"/>
      <text:p text:style-name="P66"><text:span text:style-name="T62">.boton:hover</text:span> {</text:p>
      <text:p text:style-name="P68">    <text:span text:style-name="T59">background</text:span><text:span text:style-name="T58">: </text:span><text:span text:style-name="T60">#5a3c82</text:span><text:span text:style-name="T58">;</text:span></text:p>
      <text:p text:style-name="P68">    <text:span text:style-name="T59">transition</text:span><text:span text:style-name="T58">: </text:span><text:span text:style-name="T61">0.3s</text:span><text:span text:style-name="T58">;</text:span></text:p>
      <text:p text:style-name="P66">}</text:p>
      <text:p text:style-name="P67"/>
      <text:p text:style-name="P66"><text:span text:style-name="T62">.tarjeta</text:span> {</text:p>
      <text:p text:style-name="P68">    <text:span text:style-name="T59">margin-left</text:span><text:span text:style-name="T58">: </text:span><text:span text:style-name="T61">1em</text:span><text:span text:style-name="T58">;</text:span></text:p>
      <text:p text:style-name="P66">}</text:p>
      <text:p text:style-name="P75"/>
      <text:p text:style-name="P66"><text:span text:style-name="T62">footer</text:span> {</text:p>
      <text:p text:style-name="P68">    <text:span text:style-name="T59">background</text:span><text:span text:style-name="T58">: </text:span><text:span text:style-name="T60">#330a62</text:span><text:span text:style-name="T58">;</text:span></text:p>
      <text:p text:style-name="P68">    <text:span text:style-name="T59">color</text:span><text:span text:style-name="T58">: </text:span><text:span text:style-name="T60">white</text:span><text:span text:style-name="T58">;</text:span></text:p>
      <text:p text:style-name="P68">    <text:span text:style-name="T59">text-align</text:span><text:span text:style-name="T58">: </text:span><text:span text:style-name="T60">center</text:span><text:span text:style-name="T58">;</text:span></text:p>
      <text:p text:style-name="P68">    <text:span text:style-name="T59">padding</text:span><text:span text:style-name="T58">: </text:span><text:span text:style-name="T61">15px</text:span><text:span text:style-name="T58">;</text:span></text:p>
      <text:p text:style-name="P68">    <text:span text:style-name="T59">margin-top</text:span><text:span text:style-name="T58">: </text:span><text:span text:style-name="T61">40px</text:span><text:span text:style-name="T58">;</text:span></text:p>
      <text:p text:style-name="P68">    <text:span text:style-name="T59">position</text:span><text:span text:style-name="T58">: </text:span><text:span text:style-name="T60">sticky</text:span><text:span text:style-name="T58">;</text:span></text:p>
      <text:p text:style-name="P66">}</text:p>
      <text:p text:style-name="P76"><text:line-break/><text:line-break/><text:line-break/></text:p>
      <text:p text:style-name="P66"><text:span text:style-name="T62">form</text:span> {</text:p>
      <text:p text:style-name="P68">    <text:span text:style-name="T59">margin-top</text:span><text:span text:style-name="T58">: </text:span><text:span text:style-name="T61">1em</text:span><text:span text:style-name="T58">;</text:span></text:p>
      <text:p text:style-name="P66">}</text:p>
      <text:p text:style-name="P67"/>
      <text:p text:style-name="P66"><text:span text:style-name="T62">form</text:span> <text:span text:style-name="T62">label</text:span> {</text:p>
      <text:p text:style-name="P68">    <text:span text:style-name="T59">font-weight</text:span><text:span text:style-name="T58">: </text:span><text:span text:style-name="T60">bold</text:span><text:span text:style-name="T58">;</text:span></text:p>
      <text:p text:style-name="P68">    <text:span text:style-name="T59">display</text:span><text:span text:style-name="T58">: </text:span><text:span text:style-name="T60">block</text:span><text:span text:style-name="T58">;</text:span></text:p>
      <text:p text:style-name="P68">    <text:span text:style-name="T59">margin-bottom</text:span><text:span text:style-name="T58">: </text:span><text:span text:style-name="T61">5px</text:span><text:span text:style-name="T58">;</text:span></text:p>
      <text:p text:style-name="P66">}</text:p>
      <text:p text:style-name="P67"/>
      <text:p text:style-name="P66"><text:span text:style-name="T62">form</text:span> <text:span text:style-name="T62">input</text:span>,</text:p>
      <text:p text:style-name="P66"><text:span text:style-name="T62">form</text:span> <text:span text:style-name="T62">select</text:span>,</text:p>
      <text:p text:style-name="P66"><text:soft-page-break/><text:span text:style-name="T62">form</text:span> <text:span text:style-name="T62">textarea</text:span> {</text:p>
      <text:p text:style-name="P68">    <text:span text:style-name="T59">width</text:span><text:span text:style-name="T58">: </text:span><text:span text:style-name="T61">100%</text:span><text:span text:style-name="T58">;</text:span></text:p>
      <text:p text:style-name="P68">    <text:span text:style-name="T59">padding</text:span><text:span text:style-name="T58">: </text:span><text:span text:style-name="T61">10px</text:span><text:span text:style-name="T58">;</text:span></text:p>
      <text:p text:style-name="P68">    <text:span text:style-name="T59">margin-bottom</text:span><text:span text:style-name="T58">: </text:span><text:span text:style-name="T61">15px</text:span><text:span text:style-name="T58">;</text:span></text:p>
      <text:p text:style-name="P68">    <text:span text:style-name="T59">border</text:span><text:span text:style-name="T58">: </text:span><text:span text:style-name="T61">1px</text:span><text:span text:style-name="T58"> </text:span><text:span text:style-name="T60">solid</text:span><text:span text:style-name="T58"> </text:span><text:span text:style-name="T60">#aaa</text:span><text:span text:style-name="T58">;</text:span></text:p>
      <text:p text:style-name="P68">    <text:span text:style-name="T59">border-radius</text:span><text:span text:style-name="T58">: </text:span><text:span text:style-name="T61">5px</text:span><text:span text:style-name="T58">;</text:span></text:p>
      <text:p text:style-name="P66">}</text:p>
      <text:p text:style-name="P67"/>
      <text:p text:style-name="P66"><text:span text:style-name="T62">form</text:span> <text:span text:style-name="T62">.boton</text:span> {</text:p>
      <text:p text:style-name="P68">    <text:span text:style-name="T59">padding</text:span><text:span text:style-name="T58">: </text:span><text:span text:style-name="T61">10px</text:span><text:span text:style-name="T58"> </text:span><text:span text:style-name="T61">15px</text:span><text:span text:style-name="T58">;</text:span></text:p>
      <text:p text:style-name="P68">    <text:span text:style-name="T59">background</text:span><text:span text:style-name="T58">: </text:span><text:span text:style-name="T60">#3a0a62</text:span><text:span text:style-name="T58">;</text:span></text:p>
      <text:p text:style-name="P68">    <text:span text:style-name="T59">color</text:span><text:span text:style-name="T58">: </text:span><text:span text:style-name="T60">white</text:span><text:span text:style-name="T58">;</text:span></text:p>
      <text:p text:style-name="P68">    <text:span text:style-name="T59">border-radius</text:span><text:span text:style-name="T58">: </text:span><text:span text:style-name="T61">5px</text:span><text:span text:style-name="T58">;</text:span></text:p>
      <text:p text:style-name="P68">    <text:span text:style-name="T59">cursor</text:span><text:span text:style-name="T58">: </text:span><text:span text:style-name="T60">pointer</text:span><text:span text:style-name="T58">;</text:span></text:p>
      <text:p text:style-name="P66">}</text:p>
      <text:p text:style-name="P67"/>
      <text:p text:style-name="P66"><text:span text:style-name="T62">form</text:span> <text:span text:style-name="T62">.boton:hover</text:span> {</text:p>
      <text:p text:style-name="P68">    <text:span text:style-name="T59">background</text:span><text:span text:style-name="T58">: </text:span><text:span text:style-name="T60">#5a3c82</text:span><text:span text:style-name="T58">;</text:span></text:p>
      <text:p text:style-name="P66">}</text:p>
      <text:p text:style-name="P67"/>
      <text:p text:style-name="P66"><text:span text:style-name="T62">form</text:span> <text:span text:style-name="T62">#nombre:hover</text:span>,</text:p>
      <text:p text:style-name="P66"><text:span text:style-name="T62">#email:hover</text:span>,</text:p>
      <text:p text:style-name="P66"><text:span text:style-name="T62">#tema:hover</text:span>,</text:p>
      <text:p text:style-name="P66"><text:span text:style-name="T62">#mensaje:hover</text:span> {</text:p>
      <text:p text:style-name="P68">    <text:span text:style-name="T59">border</text:span><text:span text:style-name="T58">: </text:span><text:span text:style-name="T61">1px</text:span><text:span text:style-name="T58"> </text:span><text:span text:style-name="T60">solid</text:span><text:span text:style-name="T58"> </text:span><text:span text:style-name="T60">#b38fc3</text:span><text:span text:style-name="T58">;</text:span></text:p>
      <text:p text:style-name="P68">    <text:span text:style-name="T59">box-shadow</text:span><text:span text:style-name="T58">: </text:span><text:span text:style-name="T61">0</text:span><text:span text:style-name="T58"> </text:span><text:span text:style-name="T61">4px</text:span><text:span text:style-name="T58"> </text:span><text:span text:style-name="T61">10px</text:span><text:span text:style-name="T58"> </text:span><text:span text:style-name="T63">rgba</text:span><text:span text:style-name="T58">(</text:span><text:span text:style-name="T61">101</text:span><text:span text:style-name="T58">, </text:span><text:span text:style-name="T61">62</text:span><text:span text:style-name="T58">, </text:span><text:span text:style-name="T61">116</text:span><text:span text:style-name="T58">, </text:span><text:span text:style-name="T61">0.18</text:span><text:span text:style-name="T58">);</text:span></text:p>
      <text:p text:style-name="P67"/>
      <text:p text:style-name="P66">}</text:p>
      <text:p text:style-name="P67"/>
      <text:p text:style-name="P66"><text:span text:style-name="T62">.bloqueform</text:span> {</text:p>
      <text:p text:style-name="P68">    <text:span text:style-name="T59">background</text:span><text:span text:style-name="T58">: </text:span><text:span text:style-name="T60">white</text:span><text:span text:style-name="T58">;</text:span></text:p>
      <text:p text:style-name="P68">    <text:span text:style-name="T59">padding</text:span><text:span text:style-name="T58">: </text:span><text:span text:style-name="T61">20px</text:span><text:span text:style-name="T58">;</text:span></text:p>
      <text:p text:style-name="P68">    <text:span text:style-name="T59">margin-bottom</text:span><text:span text:style-name="T58">: </text:span><text:span text:style-name="T61">1.5em</text:span><text:span text:style-name="T58">;</text:span></text:p>
      <text:p text:style-name="P68">    <text:span text:style-name="T59">border-radius</text:span><text:span text:style-name="T58">: </text:span><text:span text:style-name="T61">10px</text:span><text:span text:style-name="T58">;</text:span></text:p>
      <text:p text:style-name="P68">    <text:span text:style-name="T59">box-shadow</text:span><text:span text:style-name="T58">: </text:span><text:span text:style-name="T61">0</text:span><text:span text:style-name="T58"> </text:span><text:span text:style-name="T61">4px</text:span><text:span text:style-name="T58"> </text:span><text:span text:style-name="T61">10px</text:span><text:span text:style-name="T58"> </text:span><text:span text:style-name="T63">rgba</text:span><text:span text:style-name="T58">(</text:span><text:span text:style-name="T61">0</text:span><text:span text:style-name="T58">, </text:span><text:span text:style-name="T61">0</text:span><text:span text:style-name="T58">, </text:span><text:span text:style-name="T61">0</text:span><text:span text:style-name="T58">, </text:span><text:span text:style-name="T61">0.18</text:span><text:span text:style-name="T58">);</text:span></text:p>
      <text:p text:style-name="P68">    <text:span text:style-name="T59">display</text:span><text:span text:style-name="T58">: </text:span><text:span text:style-name="T60">flex</text:span><text:span text:style-name="T58">;</text:span></text:p>
      <text:p text:style-name="P68">    <text:span text:style-name="T59">flex-direction</text:span><text:span text:style-name="T58">: </text:span><text:span text:style-name="T60">column</text:span><text:span text:style-name="T58">;</text:span></text:p>
      <text:p text:style-name="P68">    <text:span text:style-name="T59">border</text:span><text:span text:style-name="T58">: </text:span><text:span text:style-name="T61">1px</text:span><text:span text:style-name="T58"> </text:span><text:span text:style-name="T60">dashed</text:span><text:span text:style-name="T58"> </text:span><text:span text:style-name="T63">rgb</text:span><text:span text:style-name="T58">(</text:span><text:span text:style-name="T61">100</text:span><text:span text:style-name="T58">, </text:span><text:span text:style-name="T61">86</text:span><text:span text:style-name="T58">, </text:span><text:span text:style-name="T61">111</text:span><text:span text:style-name="T58">);</text:span></text:p>
      <text:p text:style-name="P68">    <text:span text:style-name="T59">margin-top</text:span><text:span text:style-name="T58">: </text:span><text:span text:style-name="T61">1.5em</text:span><text:span text:style-name="T58">;</text:span></text:p>
      <text:p text:style-name="P66">}</text:p>
      <text:p text:style-name="P67"/>
      <text:p text:style-name="P66"><text:span text:style-name="T62">textarea</text:span> {</text:p>
      <text:p text:style-name="P68">    <text:span text:style-name="T59">resize</text:span><text:span text:style-name="T58">: </text:span><text:span text:style-name="T60">vertical</text:span><text:span text:style-name="T58">;</text:span></text:p>
      <text:p text:style-name="P66">}</text:p>
      <text:p text:style-name="P67"/>
      <text:p text:style-name="P66"><text:span text:style-name="T65">@media</text:span> (<text:span text:style-name="T54">max-width</text:span>: <text:span text:style-name="T66">700px</text:span>) {</text:p>
      <text:p text:style-name="P68">    <text:span text:style-name="T67">div</text:span><text:span text:style-name="T58"> </text:span><text:span text:style-name="T67">ul</text:span><text:span text:style-name="T58"> {</text:span></text:p>
      <text:p text:style-name="P68">        <text:span text:style-name="T59">flex-direction</text:span><text:span text:style-name="T58">: </text:span><text:span text:style-name="T60">column</text:span><text:span text:style-name="T58">;</text:span></text:p>
      <text:p text:style-name="P68">        <text:span text:style-name="T59">gap</text:span><text:span text:style-name="T58">: </text:span><text:span text:style-name="T61">10px</text:span><text:span text:style-name="T58">;</text:span></text:p>
      <text:p text:style-name="P68"><text:soft-page-break/>    <text:span text:style-name="T58">}</text:span></text:p>
      <text:p text:style-name="P67"/>
      <text:p text:style-name="P68">    <text:span text:style-name="T67">.bloque</text:span><text:span text:style-name="T58"> {</text:span></text:p>
      <text:p text:style-name="P68">        <text:span text:style-name="T59">padding</text:span><text:span text:style-name="T58">: </text:span><text:span text:style-name="T61">15px</text:span><text:span text:style-name="T58">;</text:span></text:p>
      <text:p text:style-name="P68">    <text:span text:style-name="T58">}</text:span></text:p>
      <text:p text:style-name="P67"/>
      <text:p text:style-name="P68">    <text:span text:style-name="T67">h2</text:span><text:span text:style-name="T58"> {</text:span></text:p>
      <text:p text:style-name="P68">        <text:span text:style-name="T59">font-size</text:span><text:span text:style-name="T58">: </text:span><text:span text:style-name="T61">1.6rem</text:span><text:span text:style-name="T58">;</text:span></text:p>
      <text:p text:style-name="P68">    <text:span text:style-name="T58">}</text:span></text:p>
      <text:p text:style-name="P66">}</text:p>
      <text:p text:style-name="P77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/>
    <style:font-face style:name="Aptos Display1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s" fo:country="ES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Aptos" fo:font-size="12pt" fo:language="es" fo:country="ES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1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1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Aptos Display1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/>
      <style:text-properties fo:font-size="16pt" style:letter-kerning="false" style:font-size-asian="16pt" style:language-asian="es" style:country-asian="ES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/>
    </style:style>
    <style:style style:name="Illustration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loext:opacity="100%" style:font-name="Aptos Display1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0f4761" loext:opacity="100%" style:font-name="Aptos Display1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Aptos Display1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Aptos" fo:font-family="Aptos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  <text:p text:style-name="Footer"/>
      </style:footer>
      <style:footer-first>
        <text:p text:style-name="Footer"/>
      </style:footer-first>
    </style:master-page>
    <style:master-page style:name="Converted1" style:page-layout-name="Mpm1" draw:style-name="Mdp1">
      <style:footer>
        <text:p text:style-name="Footer"><text:page-number text:select-page="current">26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umno</meta:initial-creator>
    <meta:editing-cycles>36</meta:editing-cycles>
    <meta:creation-date>2026-03-18T12:44:00</meta:creation-date>
    <dc:date>2026-06-01T13:17:03.773224700</dc:date>
    <meta:editing-duration>PT2H6M42S</meta:editing-duration>
    <meta:generator>LibreOffice/25.8.6.2$Windows_X86_64 LibreOffice_project/b4b39682cd9868fa725bc664aff94278d315bd04</meta:generator>
    <meta:print-date>2026-06-01T12:58:24.183523800</meta:print-date>
    <meta:printed-by>Archivos PDF</meta:printed-by>
    <meta:document-statistic meta:table-count="0" meta:image-count="17" meta:object-count="0" meta:page-count="30" meta:paragraph-count="647" meta:word-count="2169" meta:character-count="20595" meta:non-whitespace-character-count="15178"/>
    <meta:user-defined meta:name="AppVersion">16.0000</meta:user-defined>
    <meta:template xlink:type="simple" xlink:actuate="onRequest" xlink:title="Normal" xlink:href=""/>
  </office:meta>
</office:document-meta>
</file>